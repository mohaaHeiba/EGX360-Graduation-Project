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D000000A77075853A.png" manifest:media-type="image/png"/>
  <manifest:file-entry manifest:full-path="Pictures/10000001000004000000022F37247207.png" manifest:media-type="image/png"/>
  <manifest:file-entry manifest:full-path="Pictures/100000010000006D00000071EEE7C723.png" manifest:media-type="image/png"/>
  <manifest:file-entry manifest:full-path="Pictures/10000001000000A8000000661EADFF7B.png" manifest:media-type="image/png"/>
  <manifest:file-entry manifest:full-path="Pictures/100000010000050000000500B3546261.png" manifest:media-type="image/png"/>
  <manifest:file-entry manifest:full-path="Pictures/1000000100000556000003006B82FE97.png" manifest:media-type="image/png"/>
  <manifest:file-entry manifest:full-path="Pictures/10000000000006400000023E3D6D6698.png" manifest:media-type="image/png"/>
  <manifest:file-entry manifest:full-path="Pictures/100000010000018A00000185398704D0.png" manifest:media-type="image/png"/>
  <manifest:file-entry manifest:full-path="Pictures/1000000100000244000000A4E4F61432.png" manifest:media-type="image/png"/>
  <manifest:file-entry manifest:full-path="Pictures/10000001000001E70000008DA059785B.png" manifest:media-type="image/png"/>
  <manifest:file-entry manifest:full-path="Pictures/10000001000003B7000001C2690B4742.png" manifest:media-type="image/png"/>
  <manifest:file-entry manifest:full-path="Pictures/100000010000009C0000002CDD5EE35A.png" manifest:media-type="image/png"/>
  <manifest:file-entry manifest:full-path="Pictures/1000000100000174000000C2C522E926.png" manifest:media-type="image/png"/>
  <manifest:file-entry manifest:full-path="Pictures/10000001000000F7000000CCC66A5DED.png" manifest:media-type="image/png"/>
  <manifest:file-entry manifest:full-path="Pictures/10000001000002A100000500709971E2.png" manifest:media-type="image/png"/>
  <manifest:file-entry manifest:full-path="Pictures/1000000100001C0700000802B55F7D8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dium" svg:font-family="Medium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54cm" svg:stroke-color="#d4af37" draw:marker-start-width="0.457cm" draw:marker-end-width="0.457cm" draw:stroke-linejoin="round" draw:fill="solid" draw:fill-color="#fffdfa" draw:textarea-horizontal-align="center" draw:textarea-vertical-align="top" draw:auto-grow-height="false" draw:fit-to-size="false" style:shrink-to-fit="false" fo:min-height="4.193cm" fo:min-width="25.235cm" fo:padding-top="0.213cm" fo:padding-bottom="0.213cm" fo:padding-left="0.338cm" fo:padding-right="0.338cm" fo:wrap-option="wrap" loext:decorative="false"/>
    </style:style>
    <style:style style:name="gr2" style:family="graphic" style:parent-style-name="standard">
      <style:graphic-properties draw:fill="solid" draw:fill-color="#042c50" draw:textarea-horizontal-align="justify" draw:textarea-vertical-align="middle" draw:auto-grow-height="false" fo:min-height="10.91cm" fo:min-width="58.911cm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-6.677cm, 0cm, 0cm)" draw:image-opacity="100%" style:mirror="none" loext:decorative="false"/>
    </style:style>
    <style:style style:name="gr4" style:family="graphic" style:parent-style-name="standard">
      <style:graphic-properties draw:stroke="none" draw:fill="none" draw:fill-color="#004586" draw:textarea-horizontal-align="left" fo:min-height="9.322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fill="solid" draw:fill-color="#042c50" draw:textarea-horizontal-align="justify" draw:textarea-vertical-align="middle" draw:auto-grow-height="false" fo:min-height="4.808cm" fo:min-width="58.911cm" loext:decorative="false"/>
    </style:style>
    <style:style style:name="gr7" style:family="graphic" style:parent-style-name="standard">
      <style:graphic-properties draw:stroke="none" draw:fill="none" draw:fill-color="#004586" fo:min-height="3.45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-0.05cm" draw:shadow-offset-y="-0.05cm" draw:shadow-color="#000000" draw:shadow-opacity="30%" loext:shadow-blur="4.23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stroke="none" draw:fill="none" draw:textarea-horizontal-align="left" fo:min-height="3.419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85cm" svg:stroke-color="#d4af37" draw:stroke-linejoin="round" draw:fill="solid" draw:fill-color="#d4af37" draw:textarea-horizontal-align="center" draw:textarea-vertical-align="top" draw:auto-grow-height="false" draw:fit-to-size="false" style:shrink-to-fit="false" fo:min-height="2.344cm" fo:min-width="6.726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04cm" fo:min-width="13.367cm" fo:padding-top="0cm" fo:padding-bottom="0cm" fo:padding-left="0cm" fo:padding-right="0cm" fo:wrap-option="wrap" loext:decorative="false"/>
    </style:style>
    <style:style style:name="gr13" style:family="graphic" style:parent-style-name="standard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.085cm" svg:stroke-color="#d4af37" draw:stroke-linejoin="round" draw:fill="solid" draw:fill-color="#004586" draw:textarea-horizontal-align="center" draw:textarea-vertical-align="top" draw:auto-grow-height="false" draw:fit-to-size="false" style:shrink-to-fit="false" fo:min-height="3.673cm" fo:min-width="24.307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textarea-horizontal-align="center" fo:min-height="4.02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3.276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947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005cm" fo:min-width="0cm" loext:decorative="false"/>
    </style:style>
    <style:style style:name="gr20" style:family="graphic" style:parent-style-name="standard">
      <style:graphic-properties draw:stroke="none" draw:fill="none" draw:textarea-horizontal-align="left" fo:min-height="3.151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fo:min-height="3.541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5.004cm" draw:fill="none" draw:textarea-horizontal-align="center" fo:min-height="4.195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21.306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fo:min-height="7.687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12cm, 0cm, 0cm)" draw:image-opacity="100%" style:mirror="none" loext:decorative="fals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cm, 16.247cm, 0.796cm, 0.66cm)" draw:image-opacity="100%" style:mirror="none" loext:decorative="false"/>
    </style:style>
    <style:style style:name="gr29" style:family="graphic" style:parent-style-name="standard" style:list-style-name="L1">
      <style:graphic-properties draw:stroke="none" svg:stroke-width="0cm" draw:fill="none" draw:textarea-horizontal-align="justify" fo:min-height="16.376cm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01cm, 0cm, 0.551cm)" draw:image-opacity="100%" style:mirror="none" loext:decorative="false"/>
    </style:style>
    <style:style style:name="gr31" style:family="graphic" style:parent-style-name="standard" style:list-style-name="L1">
      <style:graphic-properties draw:stroke="none" draw:fill="none" fo:min-height="5.689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83cm, 0cm, 2.627cm, 0cm)" draw:image-opacity="100%" style:mirror="none" loext:decorative="false"/>
    </style:style>
    <style:style style:name="gr33" style:family="graphic" style:parent-style-name="standard">
      <style:graphic-properties draw:stroke="none" draw:fill="none" fo:min-height="4.83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fo:min-height="1.577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cm, 4.603cm, 1.174cm, 1.489cm)" draw:image-opacity="100%" style:mirror="none" loext:decorative="false"/>
    </style:style>
    <style:style style:name="gr36" style:family="graphic" style:parent-style-name="Object_20_with_20_no_20_fill_20_and_20_no_20_line">
      <style:graphic-properties draw:textarea-vertical-align="bottom" fo:min-height="1.577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1.839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3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5.215cm" loext:decorative="fals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54cm, 1.08cm, 3.701cm, 0.834cm)" draw:image-opacity="100%" style:mirror="none" loext:decorative="fals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456cm, 0cm)" draw:image-opacity="100%" style:mirror="none" loext:decorative="false"/>
    </style:style>
    <style:style style:name="gr42" style:family="graphic" style:parent-style-name="standard">
      <style:graphic-properties draw:stroke="none" draw:fill="none" fo:min-height="3.076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4.101cm" loext:decorative="false"/>
      <style:paragraph-properties style:writing-mode="lr-tb"/>
    </style:style>
    <style:style style:name="P1" style:family="paragraph">
      <loext:graphic-properties draw:fill="solid" draw:fill-color="#fffdf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solid" draw:fill-color="#042c5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004586"/>
      <style:paragraph-properties fo:text-align="start"/>
      <style:text-properties fo:color="#d4af37" loext:opacity="100%" fo:font-size="40pt" style:font-size-asian="40pt" style:font-size-complex="40pt"/>
    </style:style>
    <style:style style:name="P6" style:family="paragraph">
      <loext:graphic-properties draw:fill="none" draw:fill-color="#004586"/>
      <style:text-properties fo:color="#d4af37" loext:opacity="100%" fo:font-size="32pt" style:font-size-asian="32pt" style:font-size-complex="32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="none"/>
      <style:paragraph-properties fo:margin-top="0.42cm" fo:margin-bottom="0.35cm" fo:text-align="start"/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solid" draw:fill-color="#d4af37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2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loext:graphic-properties draw:fill="solid" draw:fill-color="#00458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4" style:family="paragraph">
      <style:paragraph-properties fo:margin-left="0cm" fo:margin-right="0cm" fo:margin-top="0.42cm" fo:margin-bottom="0.35cm" fo:line-height="100%" fo:text-align="center" fo:text-indent="0cm"/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15" style:family="paragraph">
      <loext:graphic-properties draw:fill="none"/>
      <style:paragraph-properties fo:margin-left="0cm" fo:margin-right="0cm" fo:margin-top="0.42cm" fo:margin-bottom="0.35cm" fo:line-height="100%" fo:text-align="center" fo:text-indent="0cm" style:writing-mode="lr-tb" style:font-independent-line-spacing="true"/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16" style:family="paragraph">
      <style:paragraph-properties fo:margin-left="0cm" fo:margin-right="0cm" fo:margin-top="0.1cm" fo:margin-bottom="0.1cm" fo:line-height="115%" fo:text-align="center" fo:text-indent="0cm"/>
    </style:style>
    <style:style style:name="P17" style:family="paragraph">
      <loext:graphic-properties draw:fill="none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Noto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="none"/>
      <style:text-properties fo:font-size="40pt" style:font-size-asian="55pt" style:font-size-complex="55pt"/>
    </style:style>
    <style:style style:name="P19" style:family="paragraph">
      <loext:graphic-properties draw:fill="none"/>
      <style:text-properties fo:color="#ffffff" loext:opacity="100%" fo:font-size="40pt" style:font-size-asian="55pt" style:font-size-complex="55pt"/>
    </style:style>
    <style:style style:name="P20" style:family="paragraph">
      <style:paragraph-properties fo:text-align="center"/>
      <style:text-properties fo:font-size="40p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000000" loext:opacity="100%" fo:font-size="45pt" fo:font-weight="bold" style:font-size-asian="45pt" style:font-weight-asian="bold" style:font-size-complex="45pt" style:font-weight-complex="bold"/>
    </style:style>
    <style:style style:name="P23" style:family="paragraph">
      <loext:graphic-properties draw:fill="none"/>
      <style:paragraph-properties fo:text-align="center"/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 fo:font-size="35pt" fo:font-weight="bold" style:font-size-asian="35pt" style:font-weight-asian="bold" style:font-size-complex="35pt" style:font-weight-complex="bold"/>
    </style:style>
    <style:style style:name="P27" style:family="paragraph">
      <style:paragraph-properties fo:margin-left="0cm" fo:margin-right="0cm" fo:margin-top="0.12cm" fo:margin-bottom="0.05cm" fo:line-height="115%" fo:text-align="start" fo:text-indent="0cm"/>
    </style:style>
    <style:style style:name="P28" style:family="paragraph">
      <style:paragraph-properties fo:margin-left="0cm" fo:margin-right="0cm" fo:margin-top="0.02cm" fo:margin-bottom="0cm" fo:line-height="115%" fo:text-align="start" fo:text-indent="0cm"/>
    </style:style>
    <style:style style:name="P29" style:family="paragraph">
      <style:paragraph-properties fo:margin-left="0cm" fo:margin-right="0cm" fo:margin-top="0.12cm" fo:margin-bottom="0.05cm" fo:line-height="150%" fo:text-align="start" fo:text-indent="0cm"/>
    </style:style>
    <style:style style:name="P30" style:family="paragraph">
      <style:paragraph-properties fo:margin-left="0cm" fo:margin-right="0cm" fo:margin-top="0.42cm" fo:margin-bottom="0.35cm" fo:line-height="115%" fo:text-align="start" fo:text-indent="0cm"/>
    </style:style>
    <style:style style:name="P31" style:family="paragraph">
      <loext:graphic-properties draw:fill="none"/>
      <style:paragraph-properties fo:margin-left="0cm" fo:margin-right="0cm" fo:margin-top="0.12cm" fo:margin-bottom="0.05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.62cm" fo:margin-bottom="0.55cm" fo:line-height="100%" fo:text-indent="0cm"/>
    </style:style>
    <style:style style:name="P33" style:family="paragraph">
      <loext:graphic-properties draw:fill="none"/>
      <style:paragraph-properties fo:margin-left="0cm" fo:margin-right="0cm" fo:margin-top="0.62cm" fo:margin-bottom="0.5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.5cm" fo:margin-bottom="0.5cm" fo:line-height="100%" fo:text-indent="0cm"/>
    </style:style>
    <style:style style:name="P35" style:family="paragraph">
      <loext:graphic-properties draw:fill="none"/>
      <style:paragraph-properties fo:margin-left="0cm" fo:margin-right="0cm" fo:margin-top="0.5cm" fo:margin-bottom="0.5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.42cm" fo:margin-bottom="0.35cm" fo:line-height="100%" fo:text-align="start" fo:text-indent="0cm"/>
    </style:style>
    <style:style style:name="P37" style:family="paragraph">
      <loext:graphic-properties draw:fill="none"/>
      <style:paragraph-properties fo:margin-left="0cm" fo:margin-right="0cm" fo:margin-top="0.42cm" fo:margin-bottom="0.35cm" fo:line-height="100%" fo:text-align="center" fo:text-indent="0cm"/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40" style:family="paragraph">
      <loext:graphic-properties draw:fill="none"/>
      <style:paragraph-properties fo:margin-left="0cm" fo:margin-right="0cm" fo:margin-top="0.5cm" fo:margin-bottom="0.5cm" fo:line-height="100%" fo:text-indent="0cm"/>
      <style:text-properties fo:color="#000000" loext:opacity="100%" fo:font-size="28pt" style:font-size-asian="28pt" style:font-size-complex="28pt"/>
    </style:style>
    <style:style style:name="P41" style:family="paragraph">
      <loext:graphic-properties draw:fill="none"/>
      <style:paragraph-properties fo:text-align="center"/>
      <style:text-properties fo:color="#000000" loext:opacity="100%"/>
    </style:style>
    <style:style style:name="P42" style:family="paragraph">
      <loext:graphic-properties draw:fill="none"/>
    </style:style>
    <style:style style:name="P43" style:family="paragraph">
      <loext:graphic-properties draw:fill="solid" draw:fill-color="#ffffff"/>
      <style:paragraph-properties fo:text-align="center"/>
    </style:style>
    <style:style style:name="P44" style:family="paragraph">
      <style:paragraph-properties fo:margin-top="0.42cm" fo:margin-bottom="0.35cm"/>
    </style:style>
    <style:style style:name="P45" style:family="paragraph">
      <loext:graphic-properties draw:fill="none"/>
      <style:paragraph-properties fo:margin-top="0.42cm" fo:margin-bottom="0.35cm"/>
      <style:text-properties fo:color="#000000" loext:opacity="100%" fo:font-size="26pt" fo:font-weight="bold" style:font-size-asian="10pt" style:font-weight-asian="bold" style:font-size-complex="10pt" style:font-weight-complex="bold"/>
    </style:style>
    <style:style style:name="P46" style:family="paragraph">
      <loext:graphic-properties draw:fill="none"/>
      <style:paragraph-properties fo:margin-top="0.42cm" fo:margin-bottom="0.35cm"/>
      <style:text-properties fo:color="#000000" loext:opacity="100%" fo:font-size="26pt" style:font-size-asian="10pt" style:font-size-complex="10pt"/>
    </style:style>
    <style:style style:name="T1" style:family="text">
      <style:text-properties fo:color="#d4af37" loext:opacity="100%" style:font-name="Montserrat" fo:font-size="56pt" fo:font-weight="bold" fo:background-color="transparent" style:font-size-asian="56pt" style:font-weight-asian="bold" style:font-size-complex="56pt" style:font-weight-complex="bold"/>
    </style:style>
    <style:style style:name="T2" style:family="text">
      <style:text-properties fo:color="#ffffff" loext:opacity="100%" style:font-name="Montserrat" fo:font-size="56pt" fo:font-weight="bold" fo:background-color="transparent" style:font-size-asian="56pt" style:font-weight-asian="bold" style:font-size-complex="56pt" style:font-weight-complex="bold"/>
    </style:style>
    <style:style style:name="T3" style:family="text">
      <style:text-properties fo:color="#ffffff" loext:opacity="100%" style:font-name="Montserrat" fo:font-size="56pt" fo:font-weight="normal" fo:background-color="transparent" style:font-size-asian="56pt" style:font-weight-asian="normal" style:font-size-complex="56pt" style:font-weight-complex="normal"/>
    </style:style>
    <style:style style:name="T4" style:family="text">
      <style:text-properties fo:color="#ffffff" loext:opacity="100%" style:font-name="Medium" fo:font-size="56pt" fo:font-weight="normal" fo:background-color="transparent" style:font-size-asian="56pt" style:font-weight-asian="normal" style:font-size-complex="56pt" style:font-weight-complex="normal"/>
    </style:style>
    <style:style style:name="T5" style:family="text">
      <style:text-properties fo:color="#ffffff" loext:opacity="100%" style:font-name="Medium" fo:font-size="54pt" fo:font-weight="normal" fo:background-color="transparent" style:font-size-asian="54pt" style:font-weight-asian="normal" style:font-size-complex="54pt" style:font-weight-complex="normal"/>
    </style:style>
    <style:style style:name="T6" style:family="text">
      <style:text-properties fo:color="#d4af37" loext:opacity="100%" style:font-name="Medium" fo:font-size="40pt" fo:font-weight="normal" fo:background-color="transparent" style:font-size-asian="40pt" style:font-weight-asian="normal" style:font-size-complex="40pt" style:font-weight-complex="normal"/>
    </style:style>
    <style:style style:name="T7" style:family="text">
      <style:text-properties fo:color="#d4af37" loext:opacity="100%" style:font-name="Medium" fo:font-size="40pt" fo:font-weight="bold" fo:background-color="transparent" style:font-size-asian="40pt" style:font-weight-asian="bold" style:font-size-complex="40pt" style:font-weight-complex="bold"/>
    </style:style>
    <style:style style:name="T8" style:family="text">
      <style:text-properties fo:color="#d4af37" loext:opacity="100%" fo:font-size="32pt" style:font-size-asian="32pt" style:font-size-complex="32pt"/>
    </style:style>
    <style:style style:name="T9" style:family="text"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variant="normal" fo:text-transform="none" fo:color="#d4af37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2" style:family="text">
      <style:text-properties fo:font-variant="normal" fo:text-transform="none" fo:color="#d4af37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30pt" style:font-style-asian="normal" style:font-weight-asian="bold" style:font-name-complex="Noto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Noto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d32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bold" fo:background-color="transparent" style:font-size-asian="55pt" style:font-style-asian="normal" style:font-weight-asian="bold" style:font-size-complex="55pt" style:font-style-complex="normal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55pt" style:font-style-asian="normal" style:font-weight-asian="bold" style:font-name-complex="Noto Sans Devanagari" style:font-size-complex="5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45pt" fo:font-weight="bold" style:font-size-asian="45pt" style:font-weight-asian="bold" style:font-size-complex="45pt" style:font-weight-complex="bold"/>
    </style:style>
    <style:style style:name="T17" style:family="text">
      <style:text-properties fo:color="#000000" loext:opacity="100%" fo:font-size="40pt" fo:font-weight="bold" fo:background-color="transparent" style:font-size-asian="40pt" style:font-weight-asian="bold" style:font-size-complex="40pt" style:font-weight-complex="bold"/>
    </style:style>
    <style:style style:name="T18" style:family="text">
      <style:text-properties fo:color="#000000" loext:opacity="100%" fo:font-size="35pt" fo:font-weight="bold" style:font-size-asian="35pt" style:font-weight-asian="bold" style:font-size-complex="35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style:letter-kerning="true" style:font-name-asian="Noto Sans CJK SC" style:font-size-asian="26pt" style:font-style-asian="normal" style:font-name-complex="Noto Sans Devanagari" style:font-size-complex="26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pt" fo:font-style="normal" fo:text-shadow="none" style:text-underline-style="none" fo:font-weight="bold" style:letter-kerning="true" style:font-name-asian="Noto Sans CJK SC" style:font-size-asian="2pt" style:font-style-asian="normal" style:font-weight-asian="bold" style:font-name-complex="Noto Sans Devanagari" style:font-size-complex="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0pt" fo:font-style="normal" fo:text-shadow="1pt 1pt" style:text-underline-style="none" fo:font-weight="bold" style:letter-kerning="true" style:font-name-asian="Noto Sans CJK SC" style:font-size-asian="40pt" style:font-style-asian="normal" style:font-weight-asian="bold" style:font-name-complex="Noto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Noto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loext:opacity="100%" fo:font-size="26pt" fo:font-weight="bold" style:font-size-asian="10pt" style:font-weight-asian="bold" style:font-size-complex="10pt" style:font-weight-complex="bold"/>
    </style:style>
    <style:style style:name="T28" style:family="text">
      <style:text-properties fo:color="#000000" loext:opacity="100%" fo:font-size="26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5c4e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2" draw:style-name="gr1" draw:text-style-name="P1" draw:layer="layout" svg:width="26.003cm" svg:height="4.711cm" svg:x="31.162cm" svg:y="73.39cm">
          <text:p/>
          <draw:enhanced-geometry draw:mirror-horizontal="false" draw:mirror-vertical="false" svg:viewBox="0 0 0 0" draw:glue-points="?f8 0 0 ?f9 ?f8 ?f10 ?f11 ?f9" draw:text-areas="?f5 ?f5 ?f6 ?f7" draw:type="ooxml-roundRect" draw:modifiers="337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style-name="gr2" draw:text-style-name="P2" draw:layer="layout" svg:width="59.411cm" svg:height="11.1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3.337cm" svg:height="7.024cm" svg:x="34.655cm" svg:y="2.231cm">
          <draw:image xlink:href="Pictures/10000001000001E70000008DA059785B.png" xlink:type="simple" xlink:show="embed" xlink:actuate="onLoad" draw:mime-type="image/png">
            <text:p/>
          </draw:image>
        </draw:frame>
        <draw:frame draw:style-name="gr4" draw:text-style-name="P5" draw:layer="layout" svg:width="39.052cm" svg:height="9.572cm" svg:x="1.635cm" svg:y="1.317cm">
          <draw:text-box>
            <text:p text:style-name="P4"><text:span text:style-name="T1">EGX360</text:span><text:span text:style-name="T2"> </text:span><text:span text:style-name="T2">- </text:span><text:span text:style-name="T3">Intellig</text:span><text:span text:style-name="T3">ent</text:span><text:span text:style-name="T4"> </text:span><text:span text:style-name="T4">Stock </text:span><text:span text:style-name="T5">Market </text:span><text:span text:style-name="T5">Analysis </text:span><text:span text:style-name="T5">and </text:span><text:span text:style-name="T5">Forecast</text:span><text:span text:style-name="T5">ing </text:span><text:span text:style-name="T5">Platfor</text:span><text:span text:style-name="T5">m</text:span></text:p>
            <text:p text:style-name="P4"><text:span text:style-name="T6">AI-Powered </text:span><text:span text:style-name="T6">EGX30 </text:span><text:span text:style-name="T6">Forecastin</text:span><text:span text:style-name="T6">g Platform</text:span><text:span text:style-name="T7"> </text:span></text:p>
          </draw:text-box>
        </draw:frame>
        <draw:g draw:style-name="gr5">
          <draw:custom-shape draw:style-name="gr6" draw:text-style-name="P2" draw:layer="layout" svg:width="59.411cm" svg:height="5.058cm" svg:x="0cm" svg:y="79.02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55.057cm" svg:height="3.703cm" svg:x="0.553cm" svg:y="80.396cm">
            <draw:text-box>
              <text:p><text:span text:style-name="T8">King Salman </text:span><text:span text:style-name="T8">International </text:span><text:span text:style-name="T8">University - El Tor </text:span><text:span text:style-name="T8">Campus - South Sinai </text:span><text:span text:style-name="T8">| www.ksiu.edua.eg</text:span></text:p>
            </draw:text-box>
          </draw:frame>
        </draw:g>
        <draw:g draw:style-name="gr5">
          <draw:frame draw:style-name="gr8" draw:text-style-name="P7" draw:layer="layout" svg:width="32.329cm" svg:height="28.031cm" svg:x="26.717cm" svg:y="6.941cm">
            <draw:image xlink:href="Pictures/100000010000050000000500B3546261.png" xlink:type="simple" xlink:show="embed" xlink:actuate="onLoad" draw:mime-type="image/png">
              <text:p/>
            </draw:image>
          </draw:frame>
          <draw:g draw:style-name="gr9">
            <draw:frame draw:style-name="gr8" draw:text-style-name="P7" draw:layer="layout" svg:width="18.698cm" svg:height="10.028cm" svg:x="33.596cm" svg:y="15.589cm">
              <draw:image xlink:href="Pictures/1000000100000556000003006B82FE97.png" xlink:type="simple" xlink:show="embed" xlink:actuate="onLoad" draw:mime-type="image/png">
                <text:p/>
              </draw:image>
            </draw:frame>
            <draw:frame draw:name="Picture 2" draw:style-name="gr8" draw:text-style-name="P7" draw:layer="layout" svg:width="6.353cm" svg:height="10.518cm" svg:x="49.186cm" svg:y="16.999cm">
              <draw:image xlink:href="Pictures/10000001000002A100000500709971E2.png" xlink:type="simple" xlink:show="embed" xlink:actuate="onLoad" draw:mime-type="image/png">
                <text:p/>
              </draw:image>
            </draw:frame>
          </draw:g>
        </draw:g>
        <draw:frame draw:style-name="gr10" draw:text-style-name="P9" draw:layer="layout" svg:width="46.457cm" svg:height="3.669cm" svg:x="33.067cm" svg:y="30.351cm">
          <draw:text-box>
            <text:p text:style-name="P8"><text:span text:style-name="T9">Results &amp; Performance</text:span></text:p>
          </draw:text-box>
        </draw:frame>
        <draw:g draw:style-name="gr5">
          <draw:custom-shape draw:name="Shape 9" draw:style-name="gr11" draw:text-style-name="P10" draw:layer="layout" svg:width="7.278cm" svg:height="2.646cm" svg:x="37.665cm" svg:y="32.453cm">
            <text:p/>
            <draw:enhanced-geometry draw:mirror-horizontal="false" draw:mirror-vertical="false" svg:viewBox="0 0 0 0" draw:glue-points="?f8 0 0 ?f9 ?f8 ?f10 ?f11 ?f9" draw:text-areas="?f5 ?f5 ?f6 ?f7" draw:type="ooxml-roundRect" draw:modifiers="337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Text 78" draw:style-name="gr12" draw:text-style-name="P11" draw:layer="layout" svg:width="13.366cm" svg:height="1.203cm" svg:x="35.43cm" svg:y="33.678cm">
            <text:p/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12" draw:layer="layout" svg:width="5.714cm" svg:height="1.817cm" svg:x="38.467cm" svg:y="32.65cm">
            <text:p/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" draw:style-name="gr14" draw:text-style-name="P13" draw:layer="layout" svg:width="24.885cm" svg:height="4.001cm" svg:x="32.141cm" svg:y="32.432cm">
            <text:p/>
            <draw:enhanced-geometry draw:mirror-horizontal="false" draw:mirror-vertical="false" svg:viewBox="0 0 0 0" draw:glue-points="?f8 0 0 ?f9 ?f8 ?f10 ?f11 ?f9" draw:text-areas="?f5 ?f5 ?f6 ?f7" draw:type="ooxml-roundRect" draw:modifiers="337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style-name="gr15" draw:text-style-name="P15" draw:layer="layout" svg:width="13.038cm" svg:height="3.211cm" svg:x="31.797cm" svg:y="34.832cm">
            <text:p text:style-name="P14"><text:span text:style-name="T10">Backtest Alpha</text:span></text:p>
            <text:p text:style-name="P14"><text:span text:style-name="T11"/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6" draw:text-style-name="P17" draw:layer="layout" svg:width="29.874cm" svg:height="4.272cm" svg:x="35.261cm" svg:y="34.828cm">
            <draw:text-box>
              <text:p text:style-name="P16"><text:span text:style-name="T12">Model Accuracy</text:span></text:p>
              <text:p text:style-name="P16"><text:span text:style-name="T13"/></text:p>
            </draw:text-box>
          </draw:frame>
          <draw:frame draw:style-name="gr17" draw:text-style-name="P18" draw:layer="layout" svg:width="12.049cm" svg:height="3.526cm" svg:x="34.285cm" svg:y="33.07cm">
            <draw:text-box>
              <text:p><text:span text:style-name="T14">+159.09%</text:span></text:p>
            </draw:text-box>
          </draw:frame>
          <draw:frame draw:style-name="gr18" draw:text-style-name="P19" draw:layer="layout" svg:width="6.901cm" svg:height="2.197cm" svg:x="47.279cm" svg:y="33.07cm">
            <draw:text-box>
              <text:p><text:span text:style-name="T15">90%</text:span></text:p>
            </draw:text-box>
          </draw:frame>
          <draw:custom-shape draw:style-name="gr19" draw:text-style-name="P20" draw:layer="layout" svg:width="0.132cm" svg:height="2.255cm" svg:x="44.164cm" svg:y="32.9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0" draw:text-style-name="P22" draw:layer="layout" svg:width="19.6cm" svg:height="3.401cm" svg:x="3.54cm" svg:y="13.474cm">
          <draw:text-box>
            <text:p text:style-name="P21"><text:span text:style-name="T16">Aim&amp; Rationale </text:span></text:p>
          </draw:text-box>
        </draw:frame>
        <draw:frame draw:style-name="gr21" draw:text-style-name="P23" draw:layer="layout" svg:width="17.462cm" svg:height="3.791cm" svg:x="33.385cm" svg:y="12.43cm">
          <draw:text-box>
            <text:p text:style-name="P4"><text:span text:style-name="T9">Adaptive Dashboard</text:span></text:p>
          </draw:text-box>
        </draw:frame>
        <draw:frame draw:style-name="gr20" draw:text-style-name="P24" draw:layer="layout" svg:width="17.639cm" svg:height="3.401cm" svg:x="17.192cm" svg:y="48.942cm">
          <draw:text-box>
            <text:p text:style-name="P21"><text:span text:style-name="T17">Future Work</text:span></text:p>
          </draw:text-box>
        </draw:frame>
        <draw:frame draw:style-name="gr22" draw:text-style-name="P26" draw:layer="layout" svg:width="19.536cm" svg:height="4.445cm" svg:x="28.771cm" svg:y="58.785cm">
          <draw:text-box>
            <text:p text:style-name="P25"><text:span text:style-name="T18"><text:s/>Download EGX360</text:span></text:p>
          </draw:text-box>
        </draw:frame>
        <draw:frame draw:style-name="gr23" draw:text-style-name="P31" draw:layer="layout" svg:width="13.652cm" svg:height="21.556cm" svg:x="2.905cm" svg:y="51.8cm">
          <draw:text-box>
            <text:p text:style-name="P27"><text:span text:style-name="T19">Technical Expertise</text:span></text:p>
            <text:list text:style-name="L1">
              <text:list-item>
                <text:p text:style-name="P27"><text:span text:style-name="T19">Stacking</text:span><text:span text:style-name="T20">: Optimized XGBoost &amp; LightGBM base learners.</text:span></text:p>
              </text:list-item>
              <text:list-item>
                <text:p text:style-name="P27"><text:span text:style-name="T19">Optuna</text:span><text:span text:style-name="T20">: Bayesian optimization for robust model stability</text:span></text:p>
              </text:list-item>
              <text:list-item>
                <text:p text:style-name="P28"><text:span text:style-name="T19">Cloud: </text:span><text:span text:style-name="T20">AWS &amp; Supabase deployment.</text:span></text:p>
              </text:list-item>
            </text:list>
            <text:p text:style-name="P29"><text:span text:style-name="T19">Core Knowledge</text:span></text:p>
            <text:list text:continue-numbering="true" text:style-name="L1">
              <text:list-item>
                <text:p text:style-name="P28"><text:span text:style-name="T19">Quant: </text:span><text:span text:style-name="T20">Technical &amp; Macro correlations.</text:span></text:p>
              </text:list-item>
              <text:list-item>
                <text:p text:style-name="P28"><text:span text:style-name="T19">NLP: </text:span><text:span text:style-name="T20">Hugging Face sentiment analysis.</text:span></text:p>
                <text:p text:style-name="P28"><text:span text:style-name="T21"/></text:p>
              </text:list-item>
            </text:list>
            <text:p text:style-name="P30"><text:span text:style-name="T19"/></text:p>
          </draw:text-box>
        </draw:frame>
        <draw:frame draw:style-name="gr24" draw:text-style-name="P33" draw:layer="layout" svg:width="24.448cm" svg:height="7.937cm" svg:x="4.174cm" svg:y="16.24cm">
          <draw:text-box>
            <text:p text:style-name="P32"><text:span text:style-name="T19">The Problem: </text:span><text:span text:style-name="T20">Egypt's retail investors make decisions with no real AI support.</text:span></text:p>
            <text:p text:style-name="P32"><text:span text:style-name="T19">The Goal: </text:span><text:span text:style-name="T20">EGX360 predicts</text:span><text:span text:style-name="T22">ز</text:span><text:span text:style-name="T22"> </text:span><text:span text:style-name="T20">market moves before they happen — with 90% accuracy</text:span></text:p>
            <text:p text:style-name="P32"><text:span text:style-name="T19">Rationale:</text:span><text:span text:style-name="T20"> Built on AWS cloud — scales to any market, any volume, in real time.</text:span></text:p>
          </draw:text-box>
        </draw:frame>
        <draw:frame draw:style-name="gr25" draw:text-style-name="P3" draw:layer="layout" svg:width="9.207cm" svg:height="9.088cm" svg:x="39.1cm" svg:y="61.762cm">
          <draw:image xlink:href="Pictures/100000010000018A00000185398704D0.png" xlink:type="simple" xlink:show="embed" xlink:actuate="onLoad" draw:mime-type="image/png">
            <text:p/>
          </draw:image>
        </draw:frame>
        <draw:frame draw:style-name="gr26" draw:text-style-name="P3" draw:layer="layout" svg:width="2.712cm" svg:height="0.001cm" svg:x="22.312cm" svg:y="31.48cm">
          <draw:image xlink:href="Pictures/10000001000000A8000000661EADFF7B.png" xlink:type="simple" xlink:show="embed" xlink:actuate="onLoad" draw:mime-type="image/png">
            <text:p/>
          </draw:image>
        </draw:frame>
        <draw:frame draw:style-name="gr25" draw:text-style-name="P3" draw:layer="layout" svg:width="1.827cm" svg:height="1.827cm" svg:x="41.268cm" svg:y="27.731cm">
          <draw:image xlink:href="Pictures/100000010000006D00000071EEE7C723.png" xlink:type="simple" xlink:show="embed" xlink:actuate="onLoad" draw:mime-type="image/png">
            <text:p/>
          </draw:image>
        </draw:frame>
        <draw:frame draw:style-name="gr27" draw:text-style-name="P3" draw:layer="layout" svg:width="2.048cm" svg:height="1.649cm" svg:x="33.965cm" svg:y="27.67cm">
          <draw:image xlink:href="Pictures/100000010000009C0000002CDD5EE35A.png" xlink:type="simple" xlink:show="embed" xlink:actuate="onLoad" draw:mime-type="image/png">
            <text:p/>
          </draw:image>
        </draw:frame>
        <draw:frame draw:style-name="gr28" draw:text-style-name="P3" draw:layer="layout" svg:width="1.588cm" svg:height="1.777cm" svg:x="37.775cm" svg:y="27.731cm">
          <draw:image xlink:href="Pictures/1000000100000244000000A4E4F61432.png" xlink:type="simple" xlink:show="embed" xlink:actuate="onLoad" draw:mime-type="image/png">
            <text:p/>
          </draw:image>
        </draw:frame>
        <draw:frame draw:style-name="gr29" draw:text-style-name="P35" draw:layer="layout" svg:width="12.592cm" svg:height="16.626cm" svg:x="16.451cm" svg:y="51.684cm">
          <draw:text-box>
            <text:p text:style-name="P34"><text:span text:style-name="T19">Live Brokerage Integration</text:span><text:span text:style-name="T20">: Migrating from paper-trading to real-world execution via local brokerage APIs for automated trade execution.</text:span></text:p>
            <text:p text:style-name="P34"><text:span text:style-name="T19">Multi-Index Expansion</text:span><text:span text:style-name="T20">: Adapting the Stacking Ensemble model to forecast broader indices like EGX70 <text:s/>for diversified stock </text:span></text:p>
            <text:p text:style-name="P34"><text:span text:style-name="T19">SHAP-Based Explainability</text:span><text:span text:style-name="T20">: Utilizing Explainable AI (XAI) to show users exactly how macroeconomic factors influenced each signal.</text:span></text:p>
          </draw:text-box>
        </draw:frame>
        <draw:frame draw:style-name="gr30" draw:text-style-name="P3" draw:layer="layout" svg:width="10.877cm" svg:height="7.937cm" svg:x="92.993cm" svg:y="49.895cm">
          <draw:image xlink:href="Pictures/1000000100000174000000C2C522E926.png" xlink:type="simple" xlink:show="embed" xlink:actuate="onLoad" draw:mime-type="image/png">
            <text:p/>
          </draw:image>
        </draw:frame>
        <draw:frame draw:style-name="gr20" draw:text-style-name="P37" draw:layer="layout" svg:width="17.465cm" svg:height="3.401cm" svg:x="3.22cm" svg:y="48.942cm">
          <draw:text-box>
            <text:p text:style-name="P36"><text:span text:style-name="T9">Lessons Learned</text:span></text:p>
          </draw:text-box>
        </draw:frame>
        <draw:frame draw:style-name="gr31" draw:text-style-name="P39" draw:layer="layout" svg:width="26.809cm" svg:height="5.939cm" svg:x="3.083cm" svg:y="72.12cm">
          <draw:text-box>
            <text:p text:style-name="P38"><text:span text:style-name="T23">EGX360 achieves 90% accuracy by synergizing Egypt-specific macroeconomic indicators with a robust Stacking Ensemble. This project bridges the gap between raw data and actionable intelligence, providing retail investors with a production-ready tool for market volatility.a</text:span></text:p>
          </draw:text-box>
        </draw:frame>
        <draw:frame draw:style-name="gr32" draw:text-style-name="P3" draw:layer="layout" svg:width="25.717cm" svg:height="9.135cm" svg:x="31.48cm" svg:y="47.745cm">
          <draw:image xlink:href="Pictures/10000000000006400000023E3D6D6698.png" xlink:type="simple" xlink:show="embed" xlink:actuate="onLoad" draw:mime-type="image/png">
            <text:p/>
          </draw:image>
        </draw:frame>
        <draw:frame draw:style-name="gr33" draw:text-style-name="P40" draw:layer="layout" svg:width="27.342cm" svg:height="5.08cm" svg:x="31.76cm" svg:y="74.025cm">
          <draw:text-box>
            <text:p text:style-name="P34"><text:span text:style-name="T24">Presented by: Mohamed Taher Amin</text:span><text:span text:style-name="T24"><text:line-break/></text:span><text:span text:style-name="T24">Supervisor: Dr. Samy Abdelnabi</text:span><text:span text:style-name="T24"><text:line-break/></text:span><text:span text:style-name="T24">Assistant: ENG: AbdulAziz</text:span></text:p>
          </draw:text-box>
        </draw:frame>
        <draw:frame draw:style-name="gr34" draw:text-style-name="P41" draw:layer="layout" svg:width="17.683cm" svg:height="1.827cm" svg:x="3.319cm" svg:y="69.897cm">
          <draw:text-box>
            <text:p text:style-name="P4"><text:span text:style-name="T9">Conclusion</text:span></text:p>
          </draw:text-box>
        </draw:frame>
        <draw:frame draw:style-name="gr35" draw:text-style-name="P3" draw:layer="layout" svg:width="25.718cm" svg:height="9.295cm" svg:x="31.48cm" svg:y="38.147cm">
          <draw:image xlink:href="Pictures/10000001000003B7000001C2690B4742.png" xlink:type="simple" xlink:show="embed" xlink:actuate="onLoad" draw:mime-type="image/png">
            <text:p/>
          </draw:image>
        </draw:frame>
        <draw:frame draw:style-name="gr36" draw:text-style-name="P4" draw:layer="layout" svg:width="5.127cm" svg:height="1.827cm" svg:x="1.905cm" svg:y="19.175cm">
          <draw:text-box>
            <text:p text:style-name="P4"><text:span text:style-name="T25">🎯</text:span></text:p>
          </draw:text-box>
        </draw:frame>
        <draw:frame draw:style-name="gr37" draw:text-style-name="P42" draw:layer="layout" svg:width="5.117cm" svg:height="2.089cm" svg:x="1.944cm" svg:y="21.849cm">
          <draw:text-box>
            <text:p text:style-name="P38"><text:span text:style-name="T26">⚡</text:span><text:span text:style-name="T22">ز</text:span></text:p>
          </draw:text-box>
        </draw:frame>
        <draw:frame draw:style-name="gr38" draw:text-style-name="P42" draw:layer="layout" svg:width="3.042cm" svg:height="1.827cm" svg:x="2.085cm" svg:y="16.635cm">
          <draw:text-box>
            <text:p><text:span text:style-name="T26">⚠️ <text:s/></text:span></text:p>
          </draw:text-box>
        </draw:frame>
        <draw:custom-shape draw:style-name="gr39" draw:text-style-name="P43" draw:layer="layout" svg:width="5.715cm" svg:height="0.953cm" svg:x="9.255cm" svg:y="42.91cm">
          <text:p/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27.085cm" svg:height="10.478cm" svg:x="2.27cm" svg:y="26.717cm">
          <draw:image xlink:href="Pictures/1000000100001C0700000802B55F7D87.png" xlink:type="simple" xlink:show="embed" xlink:actuate="onLoad" draw:mime-type="image/png">
            <text:p/>
          </draw:image>
        </draw:frame>
        <draw:frame draw:style-name="gr26" draw:text-style-name="P3" draw:layer="layout" svg:width="2.976cm" svg:height="1.587cm" svg:x="44.443cm" svg:y="28.049cm">
          <draw:image xlink:href="Pictures/10000001000000A8000000661EADFF7B.png" xlink:type="simple" xlink:show="embed" xlink:actuate="onLoad" draw:mime-type="image/png">
            <text:p/>
          </draw:image>
        </draw:frame>
        <draw:frame draw:style-name="gr40" draw:text-style-name="P3" draw:layer="layout" svg:width="25.696cm" svg:height="7.938cm" svg:x="2.905cm" svg:y="40.052cm">
          <draw:image xlink:href="Pictures/10000001000004000000022F37247207.png" xlink:type="simple" xlink:show="embed" xlink:actuate="onLoad" draw:mime-type="image/png">
            <text:p/>
          </draw:image>
        </draw:frame>
        <draw:frame draw:style-name="gr41" draw:text-style-name="P3" draw:layer="layout" svg:width="2.851cm" svg:height="1.719cm" svg:x="48.57cm" svg:y="27.731cm">
          <draw:image xlink:href="Pictures/10000001000000F7000000CCC66A5DED.png" xlink:type="simple" xlink:show="embed" xlink:actuate="onLoad" draw:mime-type="image/png">
            <text:p/>
          </draw:image>
        </draw:frame>
        <draw:frame draw:style-name="gr25" draw:text-style-name="P3" draw:layer="layout" svg:width="3.23cm" svg:height="1.792cm" svg:x="52.38cm" svg:y="27.844cm">
          <draw:image xlink:href="Pictures/100000010000012D000000A77075853A.png" xlink:type="simple" xlink:show="embed" xlink:actuate="onLoad" draw:mime-type="image/png">
            <text:p/>
          </draw:image>
        </draw:frame>
        <draw:frame draw:style-name="gr42" draw:text-style-name="P45" draw:layer="layout" svg:width="16.735cm" svg:height="3.326cm" svg:x="84.82cm" svg:y="31.162cm">
          <draw:text-box>
            <text:p text:style-name="P44"><text:span text:style-name="T27">Results &amp; Benchmark Comparison</text:span></text:p>
          </draw:text-box>
        </draw:frame>
        <draw:frame draw:style-name="gr43" draw:text-style-name="P46" draw:layer="layout" svg:width="18.549cm" svg:height="4.351cm" svg:x="32.115cm" svg:y="37.195cm">
          <draw:text-box>
            <text:p text:style-name="P44"><text:span text:style-name="T28">Live Signal Performance — EGX30 (Dec 2025 → Mar 2026)</text:span></text:p>
          </draw:text-box>
        </draw:frame>
        <draw:frame draw:style-name="gr38" draw:text-style-name="P42" draw:layer="layout" svg:width="13.429cm" svg:height="1.827cm" svg:x="3.222cm" svg:y="37.512cm">
          <draw:text-box>
            <text:p><text:span text:style-name="T9">Stacking Ensemble</text:span></text:p>
          </draw:text-box>
        </draw:frame>
        <draw:frame draw:style-name="gr38" draw:text-style-name="P42" draw:layer="layout" svg:width="14.161cm" svg:height="1.827cm" svg:x="3.349cm" svg:y="25.13cm">
          <draw:text-box>
            <text:p><text:span text:style-name="T9">System Architectur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dium" svg:font-family="Medium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shadow="visible" draw:shadow-offset-x="0cm" draw:shadow-offset-y="0cm" draw:shadow-color="#000000" draw:shadow-opacity="20%" loext:shadow-blur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23:10:41.690776053</meta:creation-date>
    <dc:date>2026-05-31T01:17:51.005328955</dc:date>
    <meta:editing-duration>PT10H43M26S</meta:editing-duration>
    <meta:editing-cycles>301</meta:editing-cycles>
    <meta:generator>LibreOffice/25.8.7.3$Linux_X86_64 LibreOffice_project/580$Build-3</meta:generator>
    <meta:print-date>2026-05-07T03:38:41.893817012</meta:print-date>
    <meta:printed-by>PDF files</meta:printed-by>
    <meta:document-statistic meta:object-count="55"/>
  </office:meta>
</office:document-meta>
</file>