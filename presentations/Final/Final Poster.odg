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3B7000001C29AD32323.png" manifest:media-type="image/png"/>
  <manifest:file-entry manifest:full-path="Pictures/10000001000005D20000024EA91CB8AA.png" manifest:media-type="image/png"/>
  <manifest:file-entry manifest:full-path="Pictures/100000010000094600000B13B56D15EB.png" manifest:media-type="image/png"/>
  <manifest:file-entry manifest:full-path="Pictures/100000010000012D000000A77075853A.png" manifest:media-type="image/png"/>
  <manifest:file-entry manifest:full-path="Pictures/10000001000001E5000004009B148D7E.png" manifest:media-type="image/png"/>
  <manifest:file-entry manifest:full-path="Pictures/100000010000006D00000071EEE7C723.png" manifest:media-type="image/png"/>
  <manifest:file-entry manifest:full-path="Pictures/10000001000000A8000000661EADFF7B.png" manifest:media-type="image/png"/>
  <manifest:file-entry manifest:full-path="Pictures/100000010000050000000500B3546261.png" manifest:media-type="image/png"/>
  <manifest:file-entry manifest:full-path="Pictures/1000000100000556000003006B82FE97.png" manifest:media-type="image/png"/>
  <manifest:file-entry manifest:full-path="Pictures/10000001000000F7000000CCC66A5DED.png" manifest:media-type="image/png"/>
  <manifest:file-entry manifest:full-path="Pictures/10000001000002A100000500709971E2.png" manifest:media-type="image/png"/>
  <manifest:file-entry manifest:full-path="Pictures/100000010000018A00000185398704D0.png" manifest:media-type="image/png"/>
  <manifest:file-entry manifest:full-path="Pictures/1000000100000244000000A4E4F61432.png" manifest:media-type="image/png"/>
  <manifest:file-entry manifest:full-path="Pictures/10000001000001E70000008DA059785B.png" manifest:media-type="image/png"/>
  <manifest:file-entry manifest:full-path="Pictures/10000001000003B7000001C2690B4742.png" manifest:media-type="image/png"/>
  <manifest:file-entry manifest:full-path="Pictures/100000010000009C0000002CDD5EE35A.png" manifest:media-type="image/png"/>
  <manifest:file-entry manifest:full-path="Pictures/1000000100000174000000C2C522E926.png" manifest:media-type="image/png"/>
  <manifest:file-entry manifest:full-path="Pictures/10000001000004000000022F3724720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80" svg:font-family="80"/>
    <style:font-face style:name="Adwaita Mono" svg:font-family="'Adwaita Mono'" style:font-pitch="fixed"/>
    <style:font-face style:name="Arial" svg:font-family="Arial"/>
    <style:font-face style:name="DejaVu Sans" svg:font-family="'DejaVu Sans'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dium" svg:font-family="Medium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54cm" svg:stroke-color="#d4af37" draw:marker-start-width="0.457cm" draw:marker-end-width="0.457cm" draw:stroke-linejoin="round" draw:fill="solid" draw:fill-color="#fffdfa" draw:textarea-horizontal-align="center" draw:textarea-vertical-align="top" draw:auto-grow-height="false" draw:fit-to-size="false" style:shrink-to-fit="false" fo:min-height="7.585cm" fo:min-width="32.244cm" fo:padding-top="0.213cm" fo:padding-bottom="0.213cm" fo:padding-left="0.338cm" fo:padding-right="0.338cm" fo:wrap-option="wrap" loext:decorative="false"/>
    </style:style>
    <style:style style:name="gr2" style:family="graphic" style:parent-style-name="standard">
      <style:graphic-properties draw:fill="solid" draw:fill-color="#042c50" draw:textarea-horizontal-align="justify" draw:textarea-vertical-align="middle" draw:auto-grow-height="false" fo:min-height="20.752cm" fo:min-width="79.441cm" loext:decorative="fals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-0.041cm, 0cm, 0cm)" draw:image-opacity="100%" style:mirror="none" loext:decorative="false"/>
    </style:style>
    <style:style style:name="gr4" style:family="graphic" style:parent-style-name="standard">
      <style:graphic-properties draw:stroke="none" draw:fill="none" draw:fill-color="#004586" draw:textarea-horizontal-align="left" fo:min-height="17.492cm" loext:decorative="false"/>
      <style:paragraph-properties style:writing-mode="lr-tb"/>
    </style:style>
    <style:style style:name="gr5" style:family="graphic" style:parent-style-name="standard">
      <style:graphic-properties draw:fill="solid" draw:fill-color="#042c50" draw:textarea-horizontal-align="justify" draw:textarea-vertical-align="middle" draw:auto-grow-height="false" fo:min-height="12.092cm" fo:min-width="80.136cm" loext:decorative="false"/>
    </style:style>
    <style:style style:name="gr6" style:family="graphic" style:parent-style-name="standard">
      <style:graphic-properties draw:stroke="none" draw:fill="none" draw:fill-color="#004586" fo:min-height="8.786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-0.05cm" draw:shadow-offset-y="-0.05cm" draw:shadow-color="#000000" draw:shadow-opacity="30%" loext:shadow-blur="4.23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>
      <style:graphic-properties loext:decorative="false"/>
    </style:style>
    <style:style style:name="gr10" style:family="graphic" style:parent-style-name="standard">
      <style:graphic-properties draw:stroke="none" draw:fill="none" draw:textarea-horizontal-align="left" fo:min-height="3.419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85cm" svg:stroke-color="#d4af37" draw:stroke-linejoin="round" draw:fill="solid" draw:fill-color="#d4af37" draw:textarea-horizontal-align="center" draw:textarea-vertical-align="top" draw:auto-grow-height="false" draw:fit-to-size="false" style:shrink-to-fit="false" fo:min-height="3.857cm" fo:min-width="10.542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905cm" fo:min-width="20.431cm" fo:padding-top="0cm" fo:padding-bottom="0cm" fo:padding-left="0cm" fo:padding-right="0cm" fo:wrap-option="wrap" loext:decorative="false"/>
    </style:style>
    <style:style style:name="gr13" style:family="graphic" style:parent-style-name="standard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solid" svg:stroke-width="0.085cm" svg:stroke-color="#d4af37" draw:stroke-linejoin="round" draw:fill="solid" draw:fill-color="#004586" draw:textarea-horizontal-align="center" draw:textarea-vertical-align="top" draw:auto-grow-height="false" draw:fit-to-size="false" style:shrink-to-fit="false" fo:min-height="6.634cm" fo:min-width="37.399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textarea-horizontal-align="center" fo:min-height="5.924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center" fo:min-height="3.124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center" fo:min-height="3.23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3.321cm" fo:min-width="0cm" loext:decorative="false"/>
    </style:style>
    <style:style style:name="gr20" style:family="graphic" style:parent-style-name="standard">
      <style:graphic-properties draw:stroke="none" draw:fill="none" draw:textarea-horizontal-align="left" fo:min-height="3.151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fo:min-height="4.735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5.004cm" draw:fill="none" draw:textarea-horizontal-align="center" fo:min-height="2.368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26.514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draw:textarea-horizontal-align="justify" draw:textarea-vertical-align="top" fo:min-height="18.962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Object_20_with_20_no_20_fill_20_and_20_no_20_lin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12cm, 0cm, 0cm)" draw:image-opacity="100%" style:mirror="none" loext:decorative="fals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cm, 16.247cm, 0.796cm, 0.66cm)" draw:image-opacity="100%" style:mirror="none" loext:decorative="false"/>
    </style:style>
    <style:style style:name="gr29" style:family="graphic" style:parent-style-name="standard" style:list-style-name="L1">
      <style:graphic-properties draw:stroke="none" svg:stroke-width="0cm" draw:fill="none" draw:textarea-horizontal-align="justify" fo:min-height="24.629cm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01cm, 0cm, 0.551cm)" draw:image-opacity="100%" style:mirror="none" loext:decorative="false"/>
    </style:style>
    <style:style style:name="gr31" style:family="graphic" style:parent-style-name="standard" style:list-style-name="L1">
      <style:graphic-properties draw:stroke="none" draw:fill="none" draw:textarea-horizontal-align="justify" fo:min-height="17.722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8.561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fo:min-height="2.368cm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3cm, 4.603cm, 1.174cm, 1.489cm)" draw:image-opacity="100%" style:mirror="none" loext:decorative="false"/>
    </style:style>
    <style:style style:name="gr35" style:family="graphic" style:parent-style-name="Object_20_with_20_no_20_fill_20_and_20_no_20_line">
      <style:graphic-properties draw:textarea-vertical-align="bottom" fo:min-height="3.155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3.155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6.309cm" loext:decorative="false"/>
      <style:paragraph-properties style:writing-mode="lr-tb"/>
    </style:style>
    <style:style style:name="gr3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5.215cm" loext:decorative="fals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54cm, 1.08cm, 3.701cm, 0.834cm)" draw:image-opacity="100%" style:mirror="none" loext:decorative="fals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456cm, 0cm)" draw:image-opacity="100%" style:mirror="none" loext:decorative="false"/>
    </style:style>
    <style:style style:name="gr41" style:family="graphic" style:parent-style-name="standard">
      <style:graphic-properties draw:stroke="none" draw:fill="none" fo:min-height="3.076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5.74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4.735cm" loext:decorative="false"/>
      <style:paragraph-properties style:writing-mode="lr-tb"/>
    </style:style>
    <style:style style:name="gr4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668cm" fo:min-width="10.107cm" loext:decorative="fals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69cm, 0cm, 0cm, 0cm)" draw:image-opacity="100%" style:mirror="none" loext:decorative="false"/>
    </style:style>
    <style:style style:name="gr46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gr4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925cm" fo:min-width="4.898cm" loext:decorative="false"/>
    </style:style>
    <style:style style:name="gr4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925cm" fo:min-width="1.405cm" loext:decorative="false"/>
    </style:style>
    <style:style style:name="gr49" style:family="graphic" style:parent-style-name="standard">
      <style:graphic-properties loext:decorative="fals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48cm, 0.496cm, 1.585cm, 1.049cm)" draw:image-opacity="100%" style:mirror="none" loext:decorative="false"/>
    </style:style>
    <style:style style:name="co1" style:family="table-column">
      <style:table-column-properties style:column-width="8.992cm" style:use-optimal-column-width="false"/>
    </style:style>
    <style:style style:name="co2" style:family="table-column">
      <style:table-column-properties style:column-width="8.669cm" style:use-optimal-column-width="false"/>
    </style:style>
    <style:style style:name="co3" style:family="table-column">
      <style:table-column-properties style:column-width="9.77cm" style:use-optimal-column-width="false"/>
    </style:style>
    <style:style style:name="co4" style:family="table-column">
      <style:table-column-properties style:column-width="7.303cm" style:use-optimal-column-width="false"/>
    </style:style>
    <style:style style:name="co5" style:family="table-column">
      <style:table-column-properties style:column-width="3.009cm" style:use-optimal-column-width="false"/>
    </style:style>
    <style:style style:name="ro1" style:family="table-row">
      <style:table-row-properties style:row-height="5.961cm" style:use-optimal-row-height="false"/>
    </style:style>
    <style:style style:name="ro2" style:family="table-row">
      <style:table-row-properties style:row-height="4.041cm" style:use-optimal-row-height="false"/>
    </style:style>
    <style:style style:name="ce1" style:family="table-cell">
      <loext:graphic-properties draw:fill="solid" draw:fill-color="#042c50"/>
      <style:paragraph-properties fo:text-align="center"/>
      <style:text-properties style:font-name="Adwaita Mono" fo:font-size="35pt" style:font-size-asian="35pt" style:font-size-complex="35pt"/>
    </style:style>
    <style:style style:name="ce2" style:family="table-cell">
      <loext:graphic-properties draw:fill="solid" draw:fill-color="#042c50"/>
      <style:paragraph-properties fo:margin-left="0cm" fo:margin-right="0cm" fo:line-height="114%" fo:text-align="center" fo:text-indent="0cm"/>
      <style:text-properties style:font-name="Adwaita Mono" fo:font-size="35pt" fo:font-weight="bold" style:font-size-asian="35pt" style:font-weight-asian="bold" style:font-name-complex="Google Sans Text" style:font-size-complex="35pt" style:font-weight-complex="bold"/>
    </style:style>
    <style:style style:name="ce3" style:family="table-cell">
      <style:paragraph-properties fo:margin-left="0cm" fo:margin-right="0cm" fo:margin-top="0cm" fo:margin-bottom="0.14cm" fo:line-height="114%" fo:text-align="center" fo:text-indent="0cm"/>
      <style:text-properties style:font-name="Google Sans Text" fo:font-size="35pt" style:font-name-asian="Google Sans Text" style:font-size-asian="35pt" style:font-name-complex="Google Sans Text" style:font-size-complex="35pt"/>
    </style:style>
    <style:style style:name="ce4" style:family="table-cell">
      <style:paragraph-properties fo:margin-left="0cm" fo:margin-right="0cm" fo:margin-top="0cm" fo:margin-bottom="0.14cm" fo:line-height="114%" fo:text-align="center" fo:text-indent="0cm"/>
      <style:text-properties style:font-name="Google Sans Text" fo:font-size="35pt" fo:font-weight="bold" style:font-name-asian="Google Sans Text" style:font-size-asian="35pt" style:font-weight-asian="bold" style:font-name-complex="Google Sans Text" style:font-size-complex="35pt" style:font-weight-complex="bold"/>
    </style:style>
    <style:style style:name="P1" style:family="paragraph">
      <loext:graphic-properties draw:fill="solid" draw:fill-color="#fffdf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solid" draw:fill-color="#042c5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  <style:text-properties fo:font-size="75pt" style:font-size-asian="75pt" style:font-size-complex="75pt"/>
    </style:style>
    <style:style style:name="P5" style:family="paragraph">
      <loext:graphic-properties draw:fill="none" draw:fill-color="#004586"/>
      <style:paragraph-properties fo:text-align="start"/>
      <style:text-properties fo:color="#d4af37" loext:opacity="100%" fo:font-size="75pt" style:font-size-asian="75pt" style:font-size-complex="75pt"/>
    </style:style>
    <style:style style:name="P6" style:family="paragraph">
      <loext:graphic-properties draw:fill="none" draw:fill-color="#004586"/>
      <style:text-properties fo:color="#d4af37" loext:opacity="100%" fo:font-size="60pt" style:font-size-asian="60pt" style:font-size-complex="60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.42cm" fo:margin-bottom="0.35cm" fo:text-align="start"/>
    </style:style>
    <style:style style:name="P9" style:family="paragraph">
      <loext:graphic-properties draw:fill="none"/>
      <style:paragraph-properties fo:margin-top="0.42cm" fo:margin-bottom="0.35cm" fo:text-align="start"/>
      <style:text-properties fo:color="#000000" loext:opacity="100%" fo:font-size="60pt" fo:font-weight="bold" style:font-size-asian="60pt" style:font-weight-asian="bold" style:font-size-complex="60pt" style:font-weight-complex="bold"/>
    </style:style>
    <style:style style:name="P10" style:family="paragraph">
      <loext:graphic-properties draw:fill="solid" draw:fill-color="#d4af37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1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2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3" style:family="paragraph">
      <loext:graphic-properties draw:fill="solid" draw:fill-color="#004586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4" style:family="paragraph">
      <style:paragraph-properties fo:margin-left="0cm" fo:margin-right="0cm" fo:margin-top="0.42cm" fo:margin-bottom="0.35cm" fo:line-height="100%" fo:text-align="center" fo:text-indent="0cm"/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P15" style:family="paragraph">
      <loext:graphic-properties draw:fill="none"/>
      <style:paragraph-properties fo:margin-left="0cm" fo:margin-right="0cm" fo:margin-top="0.42cm" fo:margin-bottom="0.35cm" fo:line-height="100%" fo:text-align="center" fo:text-indent="0cm" style:writing-mode="lr-tb" style:font-independent-line-spacing="true"/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P16" style:family="paragraph">
      <style:paragraph-properties fo:margin-left="0cm" fo:margin-right="0cm" fo:margin-top="0.1cm" fo:margin-bottom="0.1cm" fo:line-height="115%" fo:text-align="center" fo:text-indent="0cm"/>
    </style:style>
    <style:style style:name="P17" style:family="paragraph">
      <loext:graphic-properties draw:fill="none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0pt" fo:font-style="normal" fo:text-shadow="none" style:text-underline-style="none" fo:font-weight="bold" style:letter-kerning="true" style:font-name-asian="Noto Sans CJK SC" style:font-size-asian="50pt" style:font-style-asian="normal" style:font-weight-asian="bold" style:font-name-complex="Noto Sans Devanagari" style:font-size-complex="50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/>
      <style:text-properties fo:font-size="60pt" style:font-size-asian="60pt" style:font-size-complex="60pt"/>
    </style:style>
    <style:style style:name="P20" style:family="paragraph">
      <loext:graphic-properties draw:fill="none"/>
      <style:paragraph-properties fo:text-align="center"/>
      <style:text-properties fo:color="#ffffff" loext:opacity="100%" fo:font-size="60pt" style:font-size-asian="60pt" style:font-size-complex="60pt"/>
    </style:style>
    <style:style style:name="P21" style:family="paragraph">
      <style:paragraph-properties fo:text-align="center"/>
      <style:text-properties fo:font-size="40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000000" loext:opacity="100%" fo:font-size="60pt" fo:font-weight="bold" style:font-size-asian="60pt" style:font-weight-asian="bold" style:font-size-complex="60pt" style:font-weight-complex="bold"/>
    </style:style>
    <style:style style:name="P24" style:family="paragraph">
      <style:paragraph-properties fo:text-align="start"/>
    </style:style>
    <style:style style:name="P25" style:family="paragraph">
      <loext:graphic-properties draw:fill="none"/>
      <style:paragraph-properties fo:text-align="start"/>
      <style:text-properties fo:color="#000000" loext:opacity="100%" fo:font-size="60pt" fo:font-weight="bold" style:font-size-asian="60pt" style:font-weight-asian="bold" style:font-size-complex="60pt" style:font-weight-complex="bold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loext:opacity="100%" fo:font-size="60pt" fo:font-weight="bold" style:font-size-asian="60pt" style:font-weight-asian="bold" style:font-size-complex="60pt" style:font-weight-complex="bold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style:paragraph-properties fo:margin-left="0cm" fo:margin-right="0cm" fo:margin-top="0.12cm" fo:margin-bottom="0.05cm" fo:line-height="115%" fo:text-align="start" fo:text-indent="0cm"/>
    </style:style>
    <style:style style:name="P29" style:family="paragraph">
      <style:paragraph-properties fo:margin-left="0cm" fo:margin-right="0cm" fo:margin-top="0.02cm" fo:margin-bottom="0cm" fo:line-height="115%" fo:text-align="start" fo:text-indent="0cm"/>
    </style:style>
    <style:style style:name="P30" style:family="paragraph">
      <style:paragraph-properties fo:margin-left="0cm" fo:margin-right="0cm" fo:margin-top="0.12cm" fo:margin-bottom="0.05cm" fo:line-height="150%" fo:text-align="start" fo:text-indent="0cm"/>
    </style:style>
    <style:style style:name="P31" style:family="paragraph">
      <style:paragraph-properties fo:margin-left="0cm" fo:margin-right="0cm" fo:margin-top="0.42cm" fo:margin-bottom="0.35cm" fo:line-height="115%" fo:text-align="start" fo:text-indent="0cm"/>
    </style:style>
    <style:style style:name="P32" style:family="paragraph">
      <loext:graphic-properties draw:fill="none"/>
      <style:paragraph-properties fo:margin-left="0cm" fo:margin-right="0cm" fo:margin-top="0.12cm" fo:margin-bottom="0.05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0pt" fo:font-style="normal" fo:text-shadow="none" style:text-underline-style="none" fo:font-weight="normal" style:letter-kerning="true" style:font-name-asian="Noto Sans CJK SC" style:font-size-asian="50pt" style:font-style-asian="normal" style:font-weight-asian="normal" style:font-name-complex="Noto Sans Devanagari" style:font-size-complex="5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1.92cm" fo:margin-bottom="1.85cm" fo:line-height="100%" fo:text-align="justify" fo:text-indent="0cm"/>
    </style:style>
    <style:style style:name="P34" style:family="paragraph">
      <loext:graphic-properties draw:fill="none"/>
      <style:paragraph-properties fo:margin-left="0cm" fo:margin-right="0cm" fo:margin-top="1.92cm" fo:margin-bottom="1.85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0pt" fo:font-style="normal" fo:text-shadow="none" style:text-underline-style="none" fo:font-weight="normal" style:letter-kerning="true" style:font-name-asian="Noto Sans CJK SC" style:font-size-asian="50pt" style:font-style-asian="normal" style:font-weight-asian="normal" style:font-name-complex="Noto Sans Devanagari" style:font-size-complex="50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.92cm" fo:margin-bottom="0.85cm" fo:line-height="100%" fo:text-align="justify" fo:text-indent="0cm"/>
    </style:style>
    <style:style style:name="P36" style:family="paragraph">
      <style:paragraph-properties fo:margin-left="0cm" fo:margin-right="0cm" fo:margin-top="0.92cm" fo:margin-bottom="0.85cm" fo:line-height="100%" fo:text-align="start" fo:text-indent="0cm"/>
    </style:style>
    <style:style style:name="P37" style:family="paragraph">
      <loext:graphic-properties draw:fill="none"/>
      <style:paragraph-properties fo:margin-left="0cm" fo:margin-right="0cm" fo:margin-top="0.92cm" fo:margin-bottom="0.85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0pt" fo:font-style="normal" fo:text-shadow="none" style:text-underline-style="none" fo:font-weight="normal" style:letter-kerning="true" style:font-name-asian="Noto Sans CJK SC" style:font-size-asian="50pt" style:font-style-asian="normal" style:font-weight-asian="normal" style:font-name-complex="Noto Sans Devanagari" style:font-size-complex="50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.42cm" fo:margin-bottom="0.35cm" fo:line-height="100%" fo:text-align="start" fo:text-indent="0cm"/>
    </style:style>
    <style:style style:name="P39" style:family="paragraph">
      <loext:graphic-properties draw:fill="none"/>
      <style:paragraph-properties fo:margin-left="0cm" fo:margin-right="0cm" fo:margin-top="0.42cm" fo:margin-bottom="0.35cm" fo:line-height="100%" fo:text-align="start" fo:text-indent="0cm"/>
      <style:text-properties fo:color="#000000" loext:opacity="100%" fo:font-size="60pt" fo:font-weight="bold" style:font-size-asian="60pt" style:font-weight-asian="bold" style:font-size-complex="60pt" style:font-weight-complex="bold"/>
    </style:style>
    <style:style style:name="P40" style:family="paragraph">
      <style:paragraph-properties fo:margin-left="0cm" fo:margin-right="0cm" fo:margin-top="0.42cm" fo:margin-bottom="0.35cm" fo:line-height="100%" fo:text-align="justify" fo:text-indent="0cm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justify" fo:text-indent="0cm"/>
      <style:text-properties fo:font-size="50pt" style:font-size-asian="50pt" style:font-size-complex="50pt"/>
    </style:style>
    <style:style style:name="P42" style:family="paragraph">
      <style:paragraph-properties fo:margin-left="0cm" fo:margin-right="0cm" fo:margin-top="0.5cm" fo:margin-bottom="0.5cm" fo:line-height="100%" fo:text-indent="0cm"/>
    </style:style>
    <style:style style:name="P43" style:family="paragraph">
      <loext:graphic-properties draw:fill="none"/>
      <style:paragraph-properties fo:margin-left="0cm" fo:margin-right="0cm" fo:margin-top="0.5cm" fo:margin-bottom="0.5cm" fo:line-height="100%" fo:text-indent="0cm"/>
      <style:text-properties fo:color="#000000" loext:opacity="100%" fo:font-size="50pt" style:font-size-asian="50pt" style:font-size-complex="50pt"/>
    </style:style>
    <style:style style:name="P44" style:family="paragraph">
      <loext:graphic-properties draw:fill="none"/>
      <style:paragraph-properties fo:text-align="start"/>
      <style:text-properties fo:color="#000000" loext:opacity="100%" fo:font-size="60pt"/>
    </style:style>
    <style:style style:name="P45" style:family="paragraph">
      <style:paragraph-properties fo:text-align="start"/>
      <style:text-properties fo:font-size="80pt" style:font-size-asian="80pt" style:font-size-complex="80pt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loext:graphic-properties draw:fill="none"/>
      <style:text-properties fo:font-size="80pt" style:font-size-asian="80pt" style:font-size-complex="80pt"/>
    </style:style>
    <style:style style:name="P48" style:family="paragraph">
      <loext:graphic-properties draw:fill="solid" draw:fill-color="#ffffff"/>
      <style:paragraph-properties fo:text-align="center"/>
    </style:style>
    <style:style style:name="P49" style:family="paragraph">
      <style:paragraph-properties fo:margin-top="0.42cm" fo:margin-bottom="0.35cm"/>
    </style:style>
    <style:style style:name="P50" style:family="paragraph">
      <loext:graphic-properties draw:fill="none"/>
      <style:paragraph-properties fo:margin-top="0.42cm" fo:margin-bottom="0.35cm"/>
      <style:text-properties fo:color="#000000" loext:opacity="100%" fo:font-size="26pt" fo:font-weight="bold" style:font-size-asian="10pt" style:font-weight-asian="bold" style:font-size-complex="10pt" style:font-weight-complex="bold"/>
    </style:style>
    <style:style style:name="P51" style:family="paragraph">
      <loext:graphic-properties draw:fill="none"/>
      <style:paragraph-properties fo:margin-top="0.42cm" fo:margin-bottom="0.35cm"/>
      <style:text-properties fo:color="#000000" loext:opacity="100%" fo:font-size="40pt" style:font-size-asian="40pt" style:font-size-complex="40pt"/>
    </style:style>
    <style:style style:name="P52" style:family="paragraph">
      <loext:graphic-properties draw:fill="none"/>
      <style:text-properties fo:font-size="60pt" style:font-size-asian="60pt" style:font-size-complex="60pt"/>
    </style:style>
    <style:style style:name="P53" style:family="paragraph">
      <loext:graphic-properties draw:fill="none"/>
    </style:style>
    <style:style style:name="P54" style:family="paragraph">
      <style:paragraph-properties fo:text-align="center"/>
      <style:text-properties style:font-name="Adwaita Mono" fo:font-size="35pt" style:font-size-asian="35pt" style:font-size-complex="35pt"/>
    </style:style>
    <style:style style:name="P55" style:family="paragraph">
      <style:paragraph-properties fo:margin-left="0cm" fo:margin-right="0cm" fo:line-height="114%" fo:text-align="center" fo:text-indent="0cm"/>
      <style:text-properties style:font-name="Adwaita Mono" fo:font-size="35pt" fo:font-weight="bold" style:font-size-asian="35pt" style:font-weight-asian="bold" style:font-name-complex="Google Sans Text" style:font-size-complex="35pt" style:font-weight-complex="bold"/>
    </style:style>
    <style:style style:name="P56" style:family="paragraph">
      <style:paragraph-properties fo:margin-left="0cm" fo:margin-right="0cm" fo:margin-top="0cm" fo:margin-bottom="0.14cm" fo:line-height="114%" fo:text-align="center" fo:text-indent="0cm"/>
      <style:text-properties style:font-name="Google Sans Text" fo:font-size="35pt" style:font-name-asian="Google Sans Text" style:font-size-asian="35pt" style:font-name-complex="Google Sans Text" style:font-size-complex="35pt"/>
    </style:style>
    <style:style style:name="P57" style:family="paragraph">
      <style:paragraph-properties fo:margin-left="0cm" fo:margin-right="0cm" fo:margin-top="0cm" fo:margin-bottom="0.14cm" fo:line-height="114%" fo:text-align="center" fo:text-indent="0cm"/>
      <style:text-properties style:font-name="Google Sans Text" fo:font-size="35pt" fo:font-weight="bold" style:font-name-asian="Google Sans Text" style:font-size-asian="35pt" style:font-weight-asian="bold" style:font-name-complex="Google Sans Text" style:font-size-complex="35pt" style:font-weight-complex="bold"/>
    </style:style>
    <style:style style:name="T1" style:family="text">
      <style:text-properties fo:color="#d4af37" loext:opacity="100%" style:font-name="80" fo:font-size="75pt" fo:font-weight="bold" fo:background-color="transparent" style:font-size-asian="75pt" style:font-weight-asian="bold" style:font-size-complex="75pt" style:font-weight-complex="bold"/>
    </style:style>
    <style:style style:name="T2" style:family="text">
      <style:text-properties fo:color="#ffffff" loext:opacity="100%" style:font-name="80" fo:font-size="75pt" fo:font-weight="bold" fo:background-color="transparent" style:font-size-asian="75pt" style:font-weight-asian="bold" style:font-size-complex="75pt" style:font-weight-complex="bold"/>
    </style:style>
    <style:style style:name="T3" style:family="text">
      <style:text-properties fo:color="#ffffff" loext:opacity="100%" style:font-name="80" fo:font-size="75pt" fo:font-weight="normal" fo:background-color="transparent" style:font-size-asian="75pt" style:font-weight-asian="normal" style:font-size-complex="75pt" style:font-weight-complex="normal"/>
    </style:style>
    <style:style style:name="T4" style:family="text">
      <style:text-properties fo:color="#d4af37" loext:opacity="100%" style:font-name="Medium" fo:font-size="60pt" fo:font-weight="normal" fo:background-color="transparent" style:font-size-asian="60pt" style:font-weight-asian="normal" style:font-size-complex="60pt" style:font-weight-complex="normal"/>
    </style:style>
    <style:style style:name="T5" style:family="text">
      <style:text-properties fo:color="#d4af37" loext:opacity="100%" style:font-name="Medium" fo:font-size="60pt" fo:font-weight="bold" fo:background-color="transparent" style:font-size-asian="60pt" style:font-weight-asian="bold" style:font-size-complex="60pt" style:font-weight-complex="bold"/>
    </style:style>
    <style:style style:name="T6" style:family="text">
      <style:text-properties fo:color="#d4af37" loext:opacity="100%" fo:font-size="70pt" style:font-size-asian="70pt" style:font-size-complex="70pt"/>
    </style:style>
    <style:style style:name="T7" style:family="text">
      <style:text-properties fo:color="#000000" loext:opacity="100%" fo:font-size="60pt" fo:font-weight="bold" style:font-size-asian="60pt" style:font-weight-asian="bold" style:font-size-complex="60pt" style:font-weight-complex="bold"/>
    </style:style>
    <style:style style:name="T8" style:family="text">
      <style:text-properties fo:font-variant="normal" fo:text-transform="none" fo:color="#d4af37" loext:opacity="100%" style:text-outline="false" style:text-line-through-style="none" style:text-line-through-type="none" style:text-position="0% 100%" style:font-name="Arial" fo:font-size="50pt" fo:letter-spacing="normal" fo:language="en" fo:country="US" fo:font-style="normal" style:text-underline-style="none" fo:font-weight="bold" fo:background-color="transparent" style:font-size-asian="50pt" style:font-style-asian="normal" style:font-weight-asian="bold" style:font-size-complex="50pt" style:font-style-complex="normal" style:font-weight-complex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10" style:family="text">
      <style:text-properties fo:font-variant="normal" fo:text-transform="none" fo:color="#d4af37" loext:opacity="100%" style:text-outline="false" style:text-line-through-style="none" style:text-line-through-type="none" style:text-position="0% 100%" style:font-name="Arial" fo:font-size="5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50pt" style:font-style-asian="normal" style:font-weight-asian="bold" style:font-name-complex="Noto Sans Devanagari" style:font-size-complex="5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50pt" style:font-size-asian="50pt" style:font-size-complex="50pt"/>
    </style:style>
    <style:style style:name="T12" style:family="text">
      <style:text-properties fo:font-variant="normal" fo:text-transform="none" fo:color="#ffd32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Noto Sans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loext:opacity="100%" fo:font-size="60pt" fo:font-weight="bold" fo:background-color="transparent" style:font-size-asian="60pt" style:font-weight-asian="bold" style:font-size-complex="60pt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0pt" fo:font-style="normal" fo:text-shadow="none" style:text-underline-style="none" fo:font-weight="bold" style:letter-kerning="true" style:font-name-asian="Noto Sans CJK SC" style:font-size-asian="50pt" style:font-style-asian="normal" style:font-weight-asian="bold" style:font-name-complex="Noto Sans Devanagari" style:font-size-complex="5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0pt" fo:font-style="normal" fo:text-shadow="none" style:text-underline-style="none" fo:font-weight="normal" style:letter-kerning="true" style:font-name-asian="Noto Sans CJK SC" style:font-size-asian="50pt" style:font-style-asian="normal" style:font-weight-asian="normal" style:font-name-complex="Noto Sans Devanagari" style:font-size-complex="5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0pt" fo:font-style="normal" fo:text-shadow="none" style:text-underline-style="none" style:letter-kerning="true" style:font-name-asian="Noto Sans CJK SC" style:font-size-asian="50pt" style:font-style-asian="normal" style:font-name-complex="Noto Sans Devanagari" style:font-size-complex="50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50pt" fo:font-style="normal" fo:text-shadow="none" style:text-underline-style="none" fo:font-weight="normal" style:letter-kerning="true" style:font-name-asian="Noto Sans CJK SC" style:font-size-asian="50pt" style:font-style-asian="normal" style:font-weight-asian="normal" style:font-name-complex="Noto Sans Devanagari" style:font-size-complex="5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fo:font-size="60pt" fo:font-weight="bold" style:font-size-asian="40pt" style:font-weight-asian="bold" style:font-size-complex="40pt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0pt" fo:font-style="normal" fo:text-shadow="1pt 1pt" style:text-underline-style="none" fo:font-weight="bold" style:letter-kerning="true" style:font-name-asian="Noto Sans CJK SC" style:font-size-asian="80pt" style:font-style-asian="normal" style:font-weight-asian="bold" style:font-name-complex="Noto Sans Devanagari" style:font-size-complex="8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0pt" fo:font-style="normal" fo:text-shadow="none" style:text-underline-style="none" fo:font-weight="bold" style:letter-kerning="true" style:font-name-asian="Noto Sans CJK SC" style:font-size-asian="80pt" style:font-style-asian="normal" style:font-weight-asian="bold" style:font-name-complex="Noto Sans Devanagari" style:font-size-complex="8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loext:opacity="100%" fo:font-size="26pt" fo:font-weight="bold" style:font-size-asian="10pt" style:font-weight-asian="bold" style:font-size-complex="10pt" style:font-weight-complex="bold"/>
    </style:style>
    <style:style style:name="T23" style:family="text">
      <style:text-properties fo:color="#000000" loext:opacity="100%" fo:font-size="40pt" style:font-size-asian="40pt" style:font-size-complex="40pt"/>
    </style:style>
    <style:style style:name="T24" style:family="text">
      <style:text-properties style:font-name="Adwaita Mono" fo:font-size="35pt" style:font-size-asian="35pt" style:font-size-complex="35pt"/>
    </style:style>
    <style:style style:name="T25" style:family="text">
      <style:text-properties style:font-name="Adwaita Mono" fo:font-size="35pt" fo:font-weight="bold" style:font-size-asian="35pt" style:font-weight-asian="bold" style:font-name-complex="Google Sans Text" style:font-size-complex="35pt" style:font-weight-complex="bold"/>
    </style:style>
    <style:style style:name="T26" style:family="text">
      <style:text-properties style:font-name="Google Sans Text" fo:font-size="35pt" style:font-name-asian="Google Sans Text" style:font-size-asian="35pt" style:font-name-complex="Google Sans Text" style:font-size-complex="35pt"/>
    </style:style>
    <style:style style:name="T27" style:family="text">
      <style:text-properties style:font-name="Google Sans Text" fo:font-size="35pt" fo:font-weight="bold" style:font-name-asian="Google Sans Text" style:font-size-asian="35pt" style:font-weight-asian="bold" style:font-name-complex="Google Sans Text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5c4e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2" draw:style-name="gr1" draw:text-style-name="P1" draw:layer="layout" svg:width="33.08cm" svg:height="8.171cm" svg:x="44.047cm" svg:y="177.778cm">
          <text:p/>
          <draw:enhanced-geometry draw:mirror-horizontal="false" draw:mirror-vertical="false" svg:viewBox="0 0 0 0" draw:glue-points="?f8 0 0 ?f9 ?f8 ?f10 ?f11 ?f9" draw:text-areas="?f5 ?f5 ?f6 ?f7" draw:type="ooxml-roundRect" draw:modifiers="337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style-name="gr2" draw:text-style-name="P2" draw:layer="layout" svg:width="79.941cm" svg:height="21.0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3.561cm" svg:height="11.43cm" svg:x="46.085cm" svg:y="4.492cm">
          <draw:image xlink:href="Pictures/10000001000001E70000008DA059785B.png" xlink:type="simple" xlink:show="embed" xlink:actuate="onLoad" draw:mime-type="image/png">
            <text:p/>
          </draw:image>
        </draw:frame>
        <draw:frame draw:style-name="gr4" draw:text-style-name="P5" draw:layer="layout" svg:width="42.862cm" svg:height="17.742cm" svg:x="2.905cm" svg:y="4.213cm">
          <draw:text-box>
            <text:p text:style-name="P4"><text:span text:style-name="T1">EGX36</text:span><text:span text:style-name="T1">0</text:span><text:span text:style-name="T2"> - </text:span><text:span text:style-name="T3">Intellig</text:span><text:span text:style-name="T3">ent </text:span><text:span text:style-name="T3">Stock <text:s/></text:span><text:span text:style-name="T3">Marke</text:span><text:span text:style-name="T3">t </text:span><text:span text:style-name="T3">Analysi</text:span><text:span text:style-name="T3">s and </text:span><text:span text:style-name="T3">Foreca</text:span><text:span text:style-name="T3">sting </text:span><text:span text:style-name="T3">Platfor</text:span><text:span text:style-name="T3">m</text:span></text:p>
            <text:p text:style-name="P4"><text:span text:style-name="T4">AI-</text:span><text:span text:style-name="T4">Powered </text:span><text:span text:style-name="T4">EGX30 </text:span><text:span text:style-name="T4">Forecast</text:span><text:span text:style-name="T4">ing </text:span><text:span text:style-name="T4">Platform</text:span><text:span text:style-name="T5"> </text:span></text:p>
          </draw:text-box>
        </draw:frame>
        <draw:custom-shape draw:style-name="gr5" draw:text-style-name="P2" draw:layer="layout" svg:width="80.636cm" svg:height="12.342cm" svg:x="-0.626cm" svg:y="188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79.885cm" svg:height="9.036cm" svg:x="0.125cm" svg:y="191.345cm">
          <draw:text-box>
            <text:p><text:span text:style-name="T6"><text:s text:c="3"/>King </text:span><text:span text:style-name="T6">Salman </text:span><text:span text:style-name="T6">Internat</text:span><text:span text:style-name="T6">ional </text:span><text:span text:style-name="T6">Univers</text:span><text:span text:style-name="T6">ity - El </text:span><text:span text:style-name="T6">Tor </text:span><text:span text:style-name="T6">Campu</text:span><text:span text:style-name="T6">s – </text:span><text:span text:style-name="T6">South </text:span><text:span text:style-name="T6">Sinai </text:span></text:p>
            <text:p><text:span text:style-name="T6"><text:tab/></text:span><text:span text:style-name="T6"><text:tab/></text:span><text:span text:style-name="T6">| </text:span><text:span text:style-name="T6">www.ks</text:span><text:span text:style-name="T6">iu.edua.</text:span><text:span text:style-name="T6">eg</text:span></text:p>
          </draw:text-box>
        </draw:frame>
        <draw:g draw:style-name="gr7">
          <draw:frame draw:style-name="gr8" draw:text-style-name="P7" draw:layer="layout" svg:width="53.657cm" svg:height="52.705cm" svg:x="30.845cm" svg:y="11.477cm">
            <draw:image xlink:href="Pictures/100000010000050000000500B3546261.png" xlink:type="simple" xlink:show="embed" xlink:actuate="onLoad" draw:mime-type="image/png">
              <text:p/>
            </draw:image>
          </draw:frame>
          <draw:g draw:style-name="gr9">
            <draw:frame draw:style-name="gr8" draw:text-style-name="P7" draw:layer="layout" svg:width="31.034cm" svg:height="18.855cm" svg:x="42.262cm" svg:y="27.737cm">
              <draw:image xlink:href="Pictures/1000000100000556000003006B82FE97.png" xlink:type="simple" xlink:show="embed" xlink:actuate="onLoad" draw:mime-type="image/png">
                <text:p/>
              </draw:image>
            </draw:frame>
            <draw:frame draw:name="Picture 2" draw:style-name="gr8" draw:text-style-name="P7" draw:layer="layout" svg:width="10.545cm" svg:height="19.776cm" svg:x="68.137cm" svg:y="30.389cm">
              <draw:image xlink:href="Pictures/10000001000002A100000500709971E2.png" xlink:type="simple" xlink:show="embed" xlink:actuate="onLoad" draw:mime-type="image/png">
                <text:p/>
              </draw:image>
            </draw:frame>
          </draw:g>
        </draw:g>
        <draw:frame draw:style-name="gr10" draw:text-style-name="P9" draw:layer="layout" svg:width="46.457cm" svg:height="3.669cm" svg:x="42.275cm" svg:y="55.927cm">
          <draw:text-box>
            <text:p text:style-name="P8"><text:span text:style-name="T7">Results </text:span><text:span text:style-name="T7">&amp; </text:span><text:span text:style-name="T7">Perform</text:span><text:span text:style-name="T7">ance</text:span></text:p>
          </draw:text-box>
        </draw:frame>
        <draw:g draw:style-name="gr7">
          <draw:custom-shape draw:name="Shape 9" draw:style-name="gr11" draw:text-style-name="P10" draw:layer="layout" svg:width="11.124cm" svg:height="4.189cm" svg:x="49.146cm" svg:y="58.818cm">
            <text:p/>
            <draw:enhanced-geometry draw:mirror-horizontal="false" draw:mirror-vertical="false" svg:viewBox="0 0 0 0" draw:glue-points="?f8 0 0 ?f9 ?f8 ?f10 ?f11 ?f9" draw:text-areas="?f5 ?f5 ?f6 ?f7" draw:type="ooxml-roundRect" draw:modifiers="337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Text 78" draw:style-name="gr12" draw:text-style-name="P11" draw:layer="layout" svg:width="20.43cm" svg:height="1.904cm" svg:x="45.73cm" svg:y="60.758cm">
            <text:p/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" draw:text-style-name="P12" draw:layer="layout" svg:width="8.734cm" svg:height="2.876cm" svg:x="50.372cm" svg:y="59.13cm">
            <text:p/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" draw:style-name="gr14" draw:text-style-name="P13" draw:layer="layout" svg:width="38.037cm" svg:height="7.022cm" svg:x="40.703cm" svg:y="58.785cm">
            <text:p/>
            <draw:enhanced-geometry draw:mirror-horizontal="false" draw:mirror-vertical="false" svg:viewBox="0 0 0 0" draw:glue-points="?f8 0 0 ?f9 ?f8 ?f10 ?f11 ?f9" draw:text-areas="?f5 ?f5 ?f6 ?f7" draw:type="ooxml-roundRect" draw:modifiers="337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style-name="gr15" draw:text-style-name="P15" draw:layer="layout" svg:width="18.586cm" svg:height="4.058cm" svg:x="40.687cm" svg:y="62.586cm">
            <text:p text:style-name="P14"><text:span text:style-name="T8">Backtest </text:span><text:span text:style-name="T8">Alpha</text:span></text:p>
            <text:p text:style-name="P14"><text:span text:style-name="T9"/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6" draw:text-style-name="P17" draw:layer="layout" svg:width="19.249cm" svg:height="6.174cm" svg:x="59.202cm" svg:y="62.568cm">
            <draw:text-box>
              <text:p text:style-name="P16"><text:span text:style-name="T10">Model </text:span><text:span text:style-name="T10">Accuracy</text:span></text:p>
              <text:p text:style-name="P16"><text:span text:style-name="T11"/></text:p>
            </draw:text-box>
          </draw:frame>
          <draw:frame draw:style-name="gr17" draw:text-style-name="P19" draw:layer="layout" svg:width="18.254cm" svg:height="3.374cm" svg:x="41.019cm" svg:y="59.795cm">
            <draw:text-box>
              <text:p text:style-name="P18"><text:span text:style-name="T12">+159.09</text:span><text:span text:style-name="T12">%</text:span></text:p>
            </draw:text-box>
          </draw:frame>
          <draw:frame draw:style-name="gr18" draw:text-style-name="P20" draw:layer="layout" svg:width="18.918cm" svg:height="3.48cm" svg:x="59.605cm" svg:y="59.795cm">
            <draw:text-box>
              <text:p text:style-name="P18"><text:span text:style-name="T13">93%</text:span></text:p>
            </draw:text-box>
          </draw:frame>
          <draw:custom-shape draw:style-name="gr19" draw:text-style-name="P21" draw:layer="layout" svg:width="0.201cm" svg:height="3.571cm" svg:x="59.08cm" svg:y="59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0" draw:text-style-name="P23" draw:layer="layout" svg:width="19.6cm" svg:height="3.401cm" svg:x="4.493cm" svg:y="23.86cm">
          <draw:text-box>
            <text:p text:style-name="P22"><text:span text:style-name="T7">Aim&amp; </text:span><text:span text:style-name="T7">Rational</text:span><text:span text:style-name="T7">e </text:span></text:p>
          </draw:text-box>
        </draw:frame>
        <draw:frame draw:style-name="gr21" draw:text-style-name="P25" draw:layer="layout" svg:width="27.622cm" svg:height="4.985cm" svg:x="42.255cm" svg:y="23.295cm">
          <draw:text-box>
            <text:p text:style-name="P24"><text:span text:style-name="T7">Adaptiv</text:span><text:span text:style-name="T7">e </text:span><text:span text:style-name="T7">Dashbo</text:span><text:span text:style-name="T7">ard</text:span></text:p>
          </draw:text-box>
        </draw:frame>
        <draw:frame draw:style-name="gr20" draw:text-style-name="P26" draw:layer="layout" svg:width="17.639cm" svg:height="3.401cm" svg:x="3.046cm" svg:y="145.871cm">
          <draw:text-box>
            <text:p text:style-name="P22"><text:span text:style-name="T14">Future </text:span><text:span text:style-name="T14">Work</text:span></text:p>
          </draw:text-box>
        </draw:frame>
        <draw:frame draw:style-name="gr22" draw:text-style-name="P26" draw:layer="layout" svg:width="24.853cm" svg:height="2.618cm" svg:x="40.052cm" svg:y="155.227cm">
          <draw:text-box>
            <text:p text:style-name="P27"><text:span text:style-name="T7"><text:s/></text:span><text:span text:style-name="T7">Downlo</text:span><text:span text:style-name="T7">ad </text:span><text:span text:style-name="T7">EGX360</text:span></text:p>
          </draw:text-box>
        </draw:frame>
        <draw:frame draw:style-name="gr23" draw:text-style-name="P32" draw:layer="layout" svg:width="33.339cm" svg:height="26.764cm" svg:x="5.126cm" svg:y="123.143cm">
          <draw:text-box>
            <text:p text:style-name="P28"><text:span text:style-name="T15">Technical </text:span><text:span text:style-name="T15">Expertise</text:span></text:p>
            <text:list text:style-name="L1">
              <text:list-item>
                <text:p text:style-name="P28"><text:span text:style-name="T15">Stacking</text:span><text:span text:style-name="T16">: </text:span><text:span text:style-name="T16">Optimized </text:span><text:span text:style-name="T16">XGBoost </text:span><text:span text:style-name="T16">&amp; </text:span><text:span text:style-name="T16">LightGBM </text:span><text:span text:style-name="T16">base </text:span><text:span text:style-name="T16">learners.</text:span></text:p>
              </text:list-item>
              <text:list-item>
                <text:p text:style-name="P28"><text:span text:style-name="T15">Optuna</text:span><text:span text:style-name="T16">: </text:span><text:span text:style-name="T16">Bayesian </text:span><text:span text:style-name="T16">optimizati</text:span><text:span text:style-name="T16">on for </text:span><text:span text:style-name="T16">robust </text:span><text:span text:style-name="T16">model </text:span><text:span text:style-name="T16">stability</text:span></text:p>
              </text:list-item>
              <text:list-item>
                <text:p text:style-name="P29"><text:span text:style-name="T15">Cloud: </text:span><text:span text:style-name="T16">AWS &amp; </text:span><text:span text:style-name="T16">Supabase </text:span><text:span text:style-name="T16">deployme</text:span><text:span text:style-name="T16">nt.</text:span></text:p>
              </text:list-item>
            </text:list>
            <text:p text:style-name="P30"><text:span text:style-name="T15">Core </text:span><text:span text:style-name="T15">Knowledg</text:span><text:span text:style-name="T15">e</text:span></text:p>
            <text:list text:continue-numbering="true" text:style-name="L1">
              <text:list-item>
                <text:p text:style-name="P29"><text:span text:style-name="T15">Quant: </text:span><text:span text:style-name="T16">Technical </text:span><text:span text:style-name="T16">&amp; Macro </text:span><text:span text:style-name="T16">correlatio</text:span><text:span text:style-name="T16">ns.</text:span></text:p>
              </text:list-item>
              <text:list-item>
                <text:p text:style-name="P29"><text:span text:style-name="T15">NLP: </text:span><text:span text:style-name="T16">Hugging </text:span><text:span text:style-name="T16">Face </text:span><text:span text:style-name="T16">sentiment </text:span><text:span text:style-name="T16">analysis.</text:span></text:p>
                <text:p text:style-name="P29"><text:span text:style-name="T17"/></text:p>
              </text:list-item>
            </text:list>
            <text:p text:style-name="P31"><text:span text:style-name="T15"/></text:p>
          </draw:text-box>
        </draw:frame>
        <draw:frame draw:style-name="gr24" draw:text-style-name="P34" draw:layer="layout" svg:width="33.02cm" svg:height="19.212cm" svg:x="6.08cm" svg:y="28.46cm">
          <draw:text-box>
            <text:p text:style-name="P33"><text:span text:style-name="T15">The </text:span><text:span text:style-name="T15">Problem: </text:span><text:span text:style-name="T16">Egypt's </text:span><text:span text:style-name="T16">retail </text:span><text:span text:style-name="T16">investors </text:span><text:span text:style-name="T16">make </text:span><text:span text:style-name="T16">decisions </text:span><text:span text:style-name="T16">with no </text:span><text:span text:style-name="T16">real AI </text:span><text:span text:style-name="T16">support.</text:span></text:p>
            <text:p text:style-name="P33"><text:span text:style-name="T15">The Goal: </text:span><text:span text:style-name="T16">EGX360 </text:span><text:span text:style-name="T16">predicts</text:span><text:span text:style-name="T15"> </text:span><text:span text:style-name="T16">market </text:span><text:span text:style-name="T16">moves </text:span><text:span text:style-name="T16">before </text:span><text:span text:style-name="T16">they </text:span><text:span text:style-name="T16">happen — </text:span><text:span text:style-name="T16">with 93% </text:span><text:span text:style-name="T16">accuracy</text:span></text:p>
            <text:p text:style-name="P33"><text:span text:style-name="T15">Rationale:</text:span><text:span text:style-name="T16"> </text:span><text:span text:style-name="T16">Built on </text:span><text:span text:style-name="T16">AWS cloud </text:span><text:span text:style-name="T16">— scales </text:span><text:span text:style-name="T16">to any </text:span><text:span text:style-name="T16">market, </text:span><text:span text:style-name="T16">any </text:span><text:span text:style-name="T16">volume, in </text:span><text:span text:style-name="T16">real time.</text:span></text:p>
          </draw:text-box>
        </draw:frame>
        <draw:frame draw:style-name="gr25" draw:text-style-name="P3" draw:layer="layout" svg:width="14.8cm" svg:height="15.763cm" svg:x="53.51cm" svg:y="159.75cm">
          <draw:image xlink:href="Pictures/100000010000018A00000185398704D0.png" xlink:type="simple" xlink:show="embed" xlink:actuate="onLoad" draw:mime-type="image/png">
            <text:p/>
          </draw:image>
        </draw:frame>
        <draw:frame draw:style-name="gr26" draw:text-style-name="P3" draw:layer="layout" svg:width="2.712cm" svg:height="0.001cm" svg:x="37.512cm" svg:y="44.18cm">
          <draw:image xlink:href="Pictures/10000001000000A8000000661EADFF7B.png" xlink:type="simple" xlink:show="embed" xlink:actuate="onLoad" draw:mime-type="image/png">
            <text:p/>
          </draw:image>
        </draw:frame>
        <draw:frame draw:style-name="gr25" draw:text-style-name="P3" draw:layer="layout" svg:width="2.572cm" svg:height="2.656cm" svg:x="54.464cm" svg:y="50.936cm">
          <draw:image xlink:href="Pictures/100000010000006D00000071EEE7C723.png" xlink:type="simple" xlink:show="embed" xlink:actuate="onLoad" draw:mime-type="image/png">
            <text:p/>
          </draw:image>
        </draw:frame>
        <draw:frame draw:style-name="gr27" draw:text-style-name="P3" draw:layer="layout" svg:width="2.884cm" svg:height="2.397cm" svg:x="44.179cm" svg:y="50.847cm">
          <draw:image xlink:href="Pictures/100000010000009C0000002CDD5EE35A.png" xlink:type="simple" xlink:show="embed" xlink:actuate="onLoad" draw:mime-type="image/png">
            <text:p/>
          </draw:image>
        </draw:frame>
        <draw:frame draw:style-name="gr28" draw:text-style-name="P3" draw:layer="layout" svg:width="2.235cm" svg:height="2.583cm" svg:x="49.545cm" svg:y="50.936cm">
          <draw:image xlink:href="Pictures/1000000100000244000000A4E4F61432.png" xlink:type="simple" xlink:show="embed" xlink:actuate="onLoad" draw:mime-type="image/png">
            <text:p/>
          </draw:image>
        </draw:frame>
        <draw:frame draw:style-name="gr29" draw:text-style-name="P37" draw:layer="layout" svg:width="33.654cm" svg:height="24.879cm" svg:x="5.128cm" svg:y="149.272cm">
          <draw:text-box>
            <text:p text:style-name="P35"><text:span text:style-name="T15">Live Brokerage: </text:span><text:span text:style-name="T16">Transitioning from paper-</text:span><text:span text:style-name="T16">trading to real-world </text:span><text:span text:style-name="T16">execution via local brokerage </text:span><text:span text:style-name="T16">APIs.</text:span></text:p>
            <text:p text:style-name="P35"><text:span text:style-name="T15">Market Expansion: </text:span><text:span text:style-name="T16">Scaling </text:span><text:span text:style-name="T16">the Stacking Ensemble to </text:span><text:span text:style-name="T16">forecast the EGX70 and </text:span><text:span text:style-name="T16">alternative assets.</text:span></text:p>
            <text:p text:style-name="P36"><text:span text:style-name="T15">Explainable AI (XAI):</text:span><text:span text:style-name="T16"> </text:span><text:span text:style-name="T16">Integrating SHAP values to </text:span><text:span text:style-name="T16">reveal the exact </text:span><text:span text:style-name="T16">macroeconomic drivers </text:span><text:span text:style-name="T16">behind AI signals.</text:span></text:p>
          </draw:text-box>
        </draw:frame>
        <draw:frame draw:style-name="gr30" draw:text-style-name="P3" draw:layer="layout" svg:width="33.973cm" svg:height="24.79cm" svg:x="95.614cm" svg:y="80.985cm">
          <draw:image xlink:href="Pictures/1000000100000174000000C2C522E926.png" xlink:type="simple" xlink:show="embed" xlink:actuate="onLoad" draw:mime-type="image/png">
            <text:p/>
          </draw:image>
        </draw:frame>
        <draw:frame draw:style-name="gr21" draw:text-style-name="P39" draw:layer="layout" svg:width="20.638cm" svg:height="4.985cm" svg:x="3.54cm" svg:y="119.522cm">
          <draw:text-box>
            <text:p text:style-name="P38"><text:span text:style-name="T7">Lessons Learned</text:span></text:p>
          </draw:text-box>
        </draw:frame>
        <draw:frame draw:style-name="gr31" draw:text-style-name="P41" draw:layer="layout" svg:width="34.747cm" svg:height="17.972cm" svg:x="4.81cm" svg:y="173.085cm">
          <draw:text-box>
            <text:p text:style-name="P40"><text:span text:style-name="T11">By fusing </text:span><text:span text:style-name="T11">local </text:span><text:span text:style-name="T11">macroecon</text:span><text:span text:style-name="T11">omic </text:span><text:span text:style-name="T11">indicators </text:span><text:span text:style-name="T11">with a </text:span><text:span text:style-name="T11">Stacking </text:span><text:span text:style-name="T11">Ensemble, </text:span><text:span text:style-name="T11">EGX360 </text:span><text:span text:style-name="T11">achieves a </text:span><text:span text:style-name="T11">93% </text:span><text:span text:style-name="T11">directional </text:span><text:span text:style-name="T11">accuracy. </text:span><text:span text:style-name="T11">It </text:span><text:span text:style-name="T11">successfull</text:span><text:span text:style-name="T11">y bridges </text:span><text:span text:style-name="T11">the gap </text:span><text:span text:style-name="T11">between </text:span><text:span text:style-name="T11">raw market </text:span><text:span text:style-name="T11">noise and </text:span><text:span text:style-name="T11">actionable </text:span><text:span text:style-name="T11">intelligenc</text:span><text:span text:style-name="T11">e, </text:span><text:span text:style-name="T11">delivering </text:span><text:span text:style-name="T11">a </text:span><text:span text:style-name="T11">production</text:span><text:span text:style-name="T11">-ready </text:span><text:span text:style-name="T11">financial </text:span><text:span text:style-name="T11">ecosystem </text:span><text:span text:style-name="T11">for retail </text:span><text:span text:style-name="T11">investors.</text:span></text:p>
          </draw:text-box>
        </draw:frame>
        <draw:frame draw:style-name="gr32" draw:text-style-name="P43" draw:layer="layout" svg:width="34.784cm" svg:height="8.811cm" svg:x="44.807cm" svg:y="178.879cm">
          <draw:text-box>
            <text:p text:style-name="P42"><text:span text:style-name="T18">Presented </text:span><text:span text:style-name="T18">by: </text:span><text:span text:style-name="T18">Mohamed </text:span><text:span text:style-name="T18">Taher </text:span><text:span text:style-name="T18">Amin</text:span><text:span text:style-name="T18"><text:line-break/></text:span><text:span text:style-name="T18">Supervisor</text:span><text:span text:style-name="T18">: Dr. Samy </text:span><text:span text:style-name="T18">Abdelnabi</text:span><text:span text:style-name="T18"><text:line-break/></text:span><text:span text:style-name="T18">Assistant: </text:span><text:span text:style-name="T18">ENG: </text:span><text:span text:style-name="T18">AbdulAziz</text:span></text:p>
          </draw:text-box>
        </draw:frame>
        <draw:frame draw:style-name="gr33" draw:text-style-name="P44" draw:layer="layout" svg:width="17.683cm" svg:height="2.618cm" svg:x="3.222cm" svg:y="169.832cm">
          <draw:text-box>
            <text:p text:style-name="P24"><text:span text:style-name="T19">Conclus</text:span><text:span text:style-name="T19">ion</text:span></text:p>
          </draw:text-box>
        </draw:frame>
        <draw:frame draw:style-name="gr34" draw:text-style-name="P3" draw:layer="layout" svg:width="39.902cm" svg:height="18.858cm" svg:x="40.426cm" svg:y="90.409cm">
          <draw:image xlink:href="Pictures/10000001000003B7000001C2690B4742.png" xlink:type="simple" xlink:show="embed" xlink:actuate="onLoad" draw:mime-type="image/png">
            <text:p/>
          </draw:image>
        </draw:frame>
        <draw:frame draw:style-name="gr35" draw:text-style-name="P45" draw:layer="layout" svg:width="5.127cm" svg:height="3.405cm" svg:x="1.588cm" svg:y="35.29cm">
          <draw:text-box>
            <text:p text:style-name="P24"><text:span text:style-name="T20">🎯</text:span></text:p>
          </draw:text-box>
        </draw:frame>
        <draw:frame draw:style-name="gr36" draw:text-style-name="P47" draw:layer="layout" svg:width="5.117cm" svg:height="3.405cm" svg:x="2.233cm" svg:y="42.592cm">
          <draw:text-box>
            <text:p text:style-name="P46"><text:span text:style-name="T21">⚡</text:span></text:p>
          </draw:text-box>
        </draw:frame>
        <draw:frame draw:style-name="gr37" draw:text-style-name="P47" draw:layer="layout" svg:width="3.042cm" svg:height="6.559cm" svg:x="1.546cm" svg:y="28.892cm">
          <draw:text-box>
            <text:p><text:span text:style-name="T21">⚠️ <text:s/></text:span></text:p>
          </draw:text-box>
        </draw:frame>
        <draw:custom-shape draw:style-name="gr38" draw:text-style-name="P48" draw:layer="layout" svg:width="5.715cm" svg:height="0.953cm" svg:x="12.889cm" svg:y="115.617cm">
          <text:p/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4.191cm" svg:height="2.307cm" svg:x="58.935cm" svg:y="51.398cm">
          <draw:image xlink:href="Pictures/10000001000000A8000000661EADFF7B.png" xlink:type="simple" xlink:show="embed" xlink:actuate="onLoad" draw:mime-type="image/png">
            <text:p/>
          </draw:image>
        </draw:frame>
        <draw:frame draw:style-name="gr39" draw:text-style-name="P3" draw:layer="layout" svg:width="37.452cm" svg:height="13.335cm" svg:x="2.283cm" svg:y="104.822cm">
          <draw:image xlink:href="Pictures/10000001000004000000022F37247207.png" xlink:type="simple" xlink:show="embed" xlink:actuate="onLoad" draw:mime-type="image/png">
            <text:p/>
          </draw:image>
        </draw:frame>
        <draw:frame draw:style-name="gr40" draw:text-style-name="P3" draw:layer="layout" svg:width="4.015cm" svg:height="2.499cm" svg:x="64.746cm" svg:y="50.936cm">
          <draw:image xlink:href="Pictures/10000001000000F7000000CCC66A5DED.png" xlink:type="simple" xlink:show="embed" xlink:actuate="onLoad" draw:mime-type="image/png">
            <text:p/>
          </draw:image>
        </draw:frame>
        <draw:frame draw:style-name="gr25" draw:text-style-name="P3" draw:layer="layout" svg:width="4.548cm" svg:height="2.605cm" svg:x="70.112cm" svg:y="51.1cm">
          <draw:image xlink:href="Pictures/100000010000012D000000A77075853A.png" xlink:type="simple" xlink:show="embed" xlink:actuate="onLoad" draw:mime-type="image/png">
            <text:p/>
          </draw:image>
        </draw:frame>
        <draw:frame draw:style-name="gr41" draw:text-style-name="P50" draw:layer="layout" svg:width="16.735cm" svg:height="3.326cm" svg:x="86.09cm" svg:y="53.434cm">
          <draw:text-box>
            <text:p text:style-name="P49"><text:span text:style-name="T22">Results &amp; Benchmark Comparison</text:span></text:p>
          </draw:text-box>
        </draw:frame>
        <draw:frame draw:style-name="gr42" draw:text-style-name="P51" draw:layer="layout" svg:width="39.711cm" svg:height="5.99cm" svg:x="42.251cm" svg:y="88.672cm">
          <draw:text-box>
            <text:p text:style-name="P49"><text:span text:style-name="T23">Live Signal </text:span><text:span text:style-name="T23">Performance <text:s/></text:span><text:span text:style-name="T23">EGX30 (Dec 2025 </text:span><text:span text:style-name="T23">→ Mar 2026)</text:span></text:p>
          </draw:text-box>
        </draw:frame>
        <draw:frame draw:style-name="gr43" draw:text-style-name="P52" draw:layer="layout" svg:width="30.339cm" svg:height="4.985cm" svg:x="3.54cm" svg:y="102.6cm">
          <draw:text-box>
            <text:p><text:span text:style-name="T7">Stacking Ensemble</text:span></text:p>
          </draw:text-box>
        </draw:frame>
        <draw:frame draw:style-name="gr43" draw:text-style-name="P52" draw:layer="layout" svg:width="30.036cm" svg:height="4.985cm" svg:x="3.857cm" svg:y="48.942cm">
          <draw:text-box>
            <text:p><text:span text:style-name="T7">System Architecture</text:span></text:p>
          </draw:text-box>
        </draw:frame>
        <draw:frame draw:style-name="gr25" draw:text-style-name="P3" draw:layer="layout" svg:width="34.607cm" svg:height="46.891cm" svg:x="1.635cm" svg:y="54.022cm">
          <draw:image xlink:href="Pictures/100000010000094600000B13B56D15EB.png" xlink:type="simple" xlink:show="embed" xlink:actuate="onLoad" draw:mime-type="image/png">
            <text:p/>
          </draw:image>
        </draw:frame>
        <draw:custom-shape draw:style-name="gr44" draw:text-style-name="P48" draw:layer="layout" svg:width="10.607cm" svg:height="1.918cm" svg:x="17.547cm" svg:y="97.717cm">
          <text:p/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3.537cm" svg:height="2.045cm" svg:x="18.136cm" svg:y="97.717cm">
          <draw:image xlink:href="Pictures/10000001000000A8000000661EADFF7B.png" xlink:type="simple" xlink:show="embed" xlink:actuate="onLoad" draw:mime-type="image/png">
            <text:p/>
          </draw:image>
        </draw:frame>
        <draw:frame draw:style-name="gr25" draw:text-style-name="P3" draw:layer="layout" svg:width="2.358cm" svg:height="2.556cm" svg:x="23.439cm" svg:y="97.334cm">
          <draw:image xlink:href="Pictures/100000010000006D00000071EEE7C723.png" xlink:type="simple" xlink:show="embed" xlink:actuate="onLoad" draw:mime-type="image/png">
            <text:p/>
          </draw:image>
        </draw:frame>
        <draw:frame draw:style-name="gr45" draw:text-style-name="P3" draw:layer="layout" svg:width="39.125cm" svg:height="77.519cm" svg:x="-67.897cm" svg:y="54.657cm">
          <draw:image xlink:href="Pictures/10000001000001E5000004009B148D7E.png" xlink:type="simple" xlink:show="embed" xlink:actuate="onLoad" draw:mime-type="image/png">
            <text:p/>
          </draw:image>
        </draw:frame>
        <draw:frame draw:style-name="gr25" draw:text-style-name="P3" draw:layer="layout" svg:width="38.958cm" svg:height="17.941cm" svg:x="40.37cm" svg:y="69.101cm">
          <draw:image xlink:href="Pictures/10000001000005D20000024EA91CB8AA.png" xlink:type="simple" xlink:show="embed" xlink:actuate="onLoad" draw:mime-type="image/png">
            <text:p/>
          </draw:image>
        </draw:frame>
        <draw:frame draw:style-name="gr46" draw:text-style-name="P53" draw:layer="layout" svg:width="38.112cm" svg:height="1.827cm" svg:x="42.216cm" svg:y="67.117cm">
          <draw:text-box>
            <text:p text:style-name="P49"><text:span text:style-name="T23">Learning Curve and </text:span><text:span text:style-name="T23">ROC</text:span></text:p>
          </draw:text-box>
        </draw:frame>
        <draw:custom-shape draw:style-name="gr47" draw:text-style-name="P48" draw:layer="layout" svg:width="5.398cm" svg:height="3.175cm" svg:x="1.952cm" svg:y="112.7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8" draw:layer="layout" svg:width="1.905cm" svg:height="3.175cm" svg:x="5.445cm" svg:y="111.49cm">
          <text:p/>
          <draw:enhanced-geometry svg:viewBox="0 0 21600 21600" draw:type="rectangle" draw:enhanced-path="M 0 0 L 21600 0 21600 21600 0 21600 0 0 Z N"/>
        </draw:custom-shape>
        <draw:frame draw:style-name="gr49" draw:layer="layout" svg:width="37.742cm" svg:height="22.124cm" svg:x="41.081cm" svg:y="132.14cm">
          <table:table table:template-name="teal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54"><text:span text:style-name="T24"/></text:p>
                <text:p text:style-name="P54"><text:span text:style-name="T24">Study</text:span></text:p>
              </table:table-cell>
              <table:table-cell>
                <text:p text:style-name="P55"><text:span text:style-name="T25">Journal / Rank</text:span></text:p>
              </table:table-cell>
              <table:table-cell>
                <text:p text:style-name="P55"><text:span text:style-name="T25">Model Architecture</text:span></text:p>
              </table:table-cell>
              <table:table-cell>
                <text:p text:style-name="P55"><text:span text:style-name="T25">Market Context</text:span></text:p>
              </table:table-cell>
              <table:table-cell>
                <text:p text:style-name="P55"><text:span text:style-name="T25">Acc</text:span></text:p>
              </table:table-cell>
            </table:table-row>
            <table:table-row table:style-name="ro2" table:default-cell-style-name="ce3">
              <table:table-cell>
                <text:p text:style-name="P56"><text:span text:style-name="T26">Livieris et al. (2025)</text:span></text:p>
              </table:table-cell>
              <table:table-cell>
                <text:p text:style-name="P56"><text:span text:style-name="T26">Springer (Q1)</text:span></text:p>
              </table:table-cell>
              <table:table-cell>
                <text:p text:style-name="P56"><text:span text:style-name="T26">SVM, LSTM, GB</text:span></text:p>
              </table:table-cell>
              <table:table-cell>
                <text:p text:style-name="P56"><text:span text:style-name="T26">55 Global Markets</text:span></text:p>
              </table:table-cell>
              <table:table-cell>
                <text:p text:style-name="P56"><text:span text:style-name="T26">51%</text:span></text:p>
              </table:table-cell>
            </table:table-row>
            <table:table-row table:style-name="ro2" table:default-cell-style-name="ce3">
              <table:table-cell>
                <text:p text:style-name="P56"><text:span text:style-name="T26">Park et al. (2024)</text:span></text:p>
              </table:table-cell>
              <table:table-cell>
                <text:p text:style-name="P56"><text:span text:style-name="T26">MDPI (Q2)</text:span></text:p>
              </table:table-cell>
              <table:table-cell>
                <text:p text:style-name="P56"><text:span text:style-name="T26">LSTM vs GRU</text:span></text:p>
              </table:table-cell>
              <table:table-cell>
                <text:p text:style-name="P56"><text:span text:style-name="T26">NASDAQ</text:span></text:p>
              </table:table-cell>
              <table:table-cell>
                <text:p text:style-name="P56"><text:span text:style-name="T26">65%</text:span></text:p>
              </table:table-cell>
            </table:table-row>
            <table:table-row table:style-name="ro2" table:default-cell-style-name="ce3">
              <table:table-cell>
                <text:p text:style-name="P56"><text:span text:style-name="T26">Chaudhari et al. (2025)</text:span></text:p>
              </table:table-cell>
              <table:table-cell>
                <text:p text:style-name="P56"><text:span text:style-name="T26">ScienceDirect (Q2)</text:span></text:p>
              </table:table-cell>
              <table:table-cell>
                <text:p text:style-name="P56"><text:span text:style-name="T26">Ensemble + Sentiment</text:span></text:p>
              </table:table-cell>
              <table:table-cell>
                <text:p text:style-name="P56"><text:span text:style-name="T26">BSE/NSE India</text:span></text:p>
              </table:table-cell>
              <table:table-cell>
                <text:p text:style-name="P56"><text:span text:style-name="T26">72%</text:span></text:p>
              </table:table-cell>
            </table:table-row>
            <table:table-row table:style-name="ro2" table:default-cell-style-name="ce4">
              <table:table-cell>
                <text:p text:style-name="P57"><text:span text:style-name="T27">EGX360 (This Work)</text:span></text:p>
              </table:table-cell>
              <table:table-cell>
                <text:p text:style-name="P57"><text:span text:style-name="T27">KSIU Senior Project</text:span></text:p>
              </table:table-cell>
              <table:table-cell>
                <text:p text:style-name="P57"><text:span text:style-name="T27">Stacking (XGB + LGBM)</text:span></text:p>
              </table:table-cell>
              <table:table-cell>
                <text:p text:style-name="P57"><text:span text:style-name="T27">EGX30 (Egypt)</text:span></text:p>
              </table:table-cell>
              <table:table-cell>
                <text:p text:style-name="P57"><text:span text:style-name="T27">93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0" draw:text-style-name="P3" draw:layer="layout" svg:width="38.005cm" svg:height="17.145cm" svg:x="41.005cm" svg:y="112.442cm">
          <draw:image xlink:href="Pictures/10000001000003B7000001C29AD32323.png" xlink:type="simple" xlink:show="embed" xlink:actuate="onLoad" draw:mime-type="image/png">
            <text:p/>
          </draw:image>
        </draw:frame>
        <draw:frame draw:style-name="gr46" draw:text-style-name="P53" draw:layer="layout" svg:width="18.052cm" svg:height="1.827cm" svg:x="42.91cm" svg:y="110.298cm">
          <draw:text-box>
            <text:p><text:span text:style-name="T23">Cumulative Portfolio Growt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80" svg:font-family="80"/>
    <style:font-face style:name="Adwaita Mono" svg:font-family="'Adwaita Mono'" style:font-pitch="fixed"/>
    <style:font-face style:name="Arial" svg:font-family="Arial"/>
    <style:font-face style:name="DejaVu Sans" svg:font-family="'DejaVu Sans'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dium" svg:font-family="Medium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shadow="visible" draw:shadow-offset-x="0cm" draw:shadow-offset-y="0cm" draw:shadow-color="#000000" draw:shadow-opacity="20%" loext:shadow-blur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teal-title-with-border" style:family="table-cell" style:parent-style-name="default">
      <loext:graphic-properties draw:fill="solid" draw:fill-color="#50938a"/>
      <style:paragraph-properties fo:border="0.28pt solid #666666"/>
      <style:text-properties fo:color="#ffffff" loext:opacity="100%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teal-gray">
      <table:first-row table:style-name="teal-title-with-border"/>
      <table:last-row table:style-name="teal-title-with-border"/>
      <table:first-column table:style-name="teal-title-with-border"/>
      <table:last-column table:style-name="teal-title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1cm" fo:margin-bottom="1cm" fo:margin-left="1cm" fo:margin-right="1cm" fo:page-width="80.01cm" fo:page-height="200.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23:10:41.690776053</meta:creation-date>
    <dc:date>2026-06-11T17:41:05.328665060</dc:date>
    <meta:editing-duration>PT12H46M17S</meta:editing-duration>
    <meta:editing-cycles>325</meta:editing-cycles>
    <meta:generator>LibreOffice/25.8.7.3$Linux_X86_64 LibreOffice_project/580$Build-3</meta:generator>
    <meta:print-date>2026-06-11T16:41:51.726558618</meta:print-date>
    <meta:printed-by>PDF files</meta:printed-by>
    <meta:document-statistic meta:object-count="64"/>
  </office:meta>
</office:document-meta>
</file>