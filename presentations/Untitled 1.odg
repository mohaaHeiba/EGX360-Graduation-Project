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100000500709971E2.png" manifest:media-type="image/png"/>
  <manifest:file-entry manifest:full-path="Pictures/1000000100000556000003006B82FE97.png" manifest:media-type="image/png"/>
  <manifest:file-entry manifest:full-path="Pictures/100000010000050000000500B3546261.png" manifest:media-type="image/png"/>
  <manifest:file-entry manifest:full-path="Pictures/1000000000000780000004385235E22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M Sans" svg:font-family="'DM Sans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re Baskerville" svg:font-family="'Libre Baskerville'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-0.05cm" draw:shadow-offset-y="-0.05cm" draw:shadow-color="#000000" draw:shadow-opacity="30%" loext:shadow-blur="4.23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523cm" fo:min-width="33.2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454240" draw:opacity="50%" draw:textarea-horizontal-align="justify" draw:textarea-vertical-align="top" draw:auto-grow-height="false" draw:fit-to-size="false" style:shrink-to-fit="false" fo:min-height="0.118cm" fo:min-width="29.976cm" fo:padding-top="-0.025cm" fo:padding-bottom="-0.025cm" fo:padding-left="0.25cm" fo:padding-right="0.25cm" fo:wrap-option="wrap" loext:decorative="false"/>
    </style:style>
    <style:style style:name="gr4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.292cm" fo:min-width="21.272cm" fo:padding-top="0cm" fo:padding-bottom="0cm" fo:padding-left="0cm" fo:padding-right="0cm" fo:wrap-option="wrap" loext:decorative="false"/>
    </style:style>
    <style:style style:name="gr5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cm" fo:min-width="10.836cm" fo:padding-top="0cm" fo:padding-bottom="0cm" fo:padding-left="0cm" fo:padding-right="0cm" fo:wrap-option="wrap" loext:decorative="false"/>
    </style:style>
    <style:style style:name="gr6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937cm" fo:min-width="10.195cm" fo:padding-top="0cm" fo:padding-bottom="0cm" fo:padding-left="0cm" fo:padding-right="0cm" fo:wrap-option="wrap" loext:decorative="false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.292cm" fo:min-width="17.47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85cm" svg:stroke-color="#d4af37" draw:stroke-linejoin="round" draw:fill="solid" draw:fill-color="#fffdfa" draw:textarea-horizontal-align="center" draw:textarea-vertical-align="top" draw:auto-grow-height="false" draw:fit-to-size="false" style:shrink-to-fit="false" fo:min-height="2.283cm" fo:min-width="5.206cm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175cm" fo:min-width="10.574cm" fo:padding-top="0cm" fo:padding-bottom="0cm" fo:padding-left="0cm" fo:padding-right="0cm" fo:wrap-option="wrap" loext:decorative="false"/>
    </style:style>
    <style:style style:name="gr10" style:family="graphic" style:parent-style-name="standard">
      <style:graphic-properties draw:stroke="solid" svg:stroke-width="0.085cm" svg:stroke-color="#d4af37" draw:stroke-linejoin="round" draw:fill="solid" draw:fill-color="#fffdfa" draw:textarea-horizontal-align="center" draw:textarea-vertical-align="top" draw:auto-grow-height="false" draw:fit-to-size="false" style:shrink-to-fit="false" fo:min-height="4.552cm" fo:min-width="11.468cm" fo:padding-top="0.125cm" fo:padding-bottom="0.125cm" fo:padding-left="0.25cm" fo:padding-right="0.25cm" fo:wrap-option="wrap" loext:decorative="false"/>
    </style:style>
    <style:style style:name="gr11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92cm" fo:min-width="8.391cm" fo:padding-top="0cm" fo:padding-bottom="0cm" fo:padding-left="0cm" fo:padding-right="0cm" fo:wrap-option="wrap" loext:decorative="false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63cm" fo:min-width="10.93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>
      <style:graphic-properties style:writing-mode="lr-tb" loext:decorative="false"/>
    </style:style>
    <style:style style:name="gr14" style:family="graphic">
      <style:graphic-properties loext:decorative="false"/>
    </style:style>
    <style:style style:name="gr15" style:family="graphic" style:parent-style-name="standard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42cm" fo:margin-bottom="0.35cm" fo:line-height="1.958cm" fo:text-align="start" fo:text-indent="0cm" loext:tab-stop-distance="2.54cm">
        <style:tab-stops>
          <style:tab-stop style:position="0cm"/>
        </style:tab-stops>
      </style:paragraph-properties>
      <style:text-properties fo:font-size="18pt"/>
    </style:style>
    <style:style style:name="P3" style:family="paragraph">
      <loext:graphic-properties draw:fill="none"/>
      <style:paragraph-properties fo:margin-left="0cm" fo:margin-right="0cm" fo:margin-top="0.42cm" fo:margin-bottom="0.35cm" fo:line-height="1.958cm" fo:text-align="start" fo:text-indent="0cm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solid" draw:fill-color="#454240" draw:opacity="50%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6" style:family="paragraph">
      <style:paragraph-properties fo:margin-left="0cm" fo:margin-right="0cm" fo:margin-top="0.42cm" fo:margin-bottom="0.35cm" fo:line-height="1.252cm" fo:text-align="start" fo:text-indent="0cm" loext:tab-stop-distance="2.54cm">
        <style:tab-stops>
          <style:tab-stop style:position="0cm"/>
        </style:tab-stops>
      </style:paragraph-properties>
      <style:text-properties fo:font-size="18pt"/>
    </style:style>
    <style:style style:name="P7" style:family="paragraph">
      <loext:graphic-properties draw:fill="none"/>
      <style:paragraph-properties fo:margin-left="0cm" fo:margin-right="0cm" fo:margin-top="0.42cm" fo:margin-bottom="0.35cm" fo:line-height="1.252cm" fo:text-align="start" fo:text-indent="0cm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solid" draw:fill-color="#fffdf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  <style:text-properties fo:font-size="18pt"/>
    </style:style>
    <style:style style:name="P10" style:family="paragraph">
      <style:paragraph-properties fo:margin-left="0cm" fo:margin-right="0cm" fo:margin-top="0.32cm" fo:margin-bottom="0.25cm" fo:line-height="100%" fo:text-align="start" fo:text-indent="0cm" loext:tab-stop-distance="2.54cm">
        <style:tab-stops>
          <style:tab-stop style:position="0cm"/>
        </style:tab-stops>
      </style:paragraph-properties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2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5c4e3d" loext:opacity="100%" style:text-outline="false" style:text-line-through-style="none" style:text-line-through-type="none" style:text-position="0% 100%" style:font-name="Libre Baskerville" fo:font-size="44.5pt" fo:letter-spacing="normal" fo:language="en" fo:country="US" fo:font-style="normal" style:text-underline-style="none" fo:font-weight="normal" fo:background-color="transparent" style:font-name-asian="Libre Baskerville" style:font-size-asian="44.5pt" style:font-style-asian="normal" style:font-weight-asian="normal" style:font-size-complex="44.5pt" style:font-style-complex="normal" style:font-weight-complex="normal"/>
    </style:style>
    <style:style style:name="T2" style:family="text">
      <style:text-properties fo:font-variant="normal" fo:text-transform="none" fo:color="#454240" loext:opacity="100%" style:text-outline="false" style:text-line-through-style="none" style:text-line-through-type="none" style:text-position="0% 100%" style:font-name="DM Sans" fo:font-size="22pt" fo:letter-spacing="normal" fo:language="en" fo:country="US" fo:font-style="normal" style:text-underline-style="none" fo:font-weight="normal" fo:background-color="transparent" style:font-name-asian="DM Sans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5c4e3d" loext:opacity="100%" style:text-outline="false" style:text-line-through-style="none" style:text-line-through-type="none" style:text-position="0% 100%" style:font-name="DM Sans" fo:font-size="22pt" fo:letter-spacing="normal" fo:language="en" fo:country="US" fo:font-style="normal" style:text-underline-style="none" fo:font-weight="bold" fo:background-color="transparent" style:font-name-asian="DM Sans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font-variant="normal" fo:text-transform="none" fo:color="#5c4e3d" loext:opacity="100%" style:text-outline="false" style:text-line-through-style="none" style:text-line-through-type="none" style:text-position="0% 100%" style:font-name="Libre Baskerville" fo:font-size="22pt" fo:letter-spacing="normal" fo:language="en" fo:country="US" fo:font-style="normal" style:text-underline-style="none" fo:font-weight="normal" fo:background-color="transparent" style:font-name-asian="Libre Baskerville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5c4e3d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Noto Sans CJK SC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5c4e3d" loext:opacity="100%" style:text-outline="false" style:text-line-through-style="none" style:text-line-through-type="none" style:text-position="0% 100%" style:font-name="Libre Baskerville" fo:font-size="18pt" fo:letter-spacing="normal" fo:language="en" fo:country="US" fo:font-style="normal" style:text-underline-style="none" fo:font-weight="normal" fo:background-color="transparent" style:font-name-asian="Noto Sans CJK SC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5c4e3d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5c4e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4542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132" draw:style-name="gr1" draw:text-style-name="P1" draw:layer="layout" svg:width="41.052cm" svg:height="23.086cm" svg:x="-0.42cm" svg:y="0.003cm">
          <draw:image xlink:href="Pictures/1000000000000780000004385235E22F.png" xlink:type="simple" xlink:show="embed" xlink:actuate="onLoad" draw:mime-type="image/png">
            <text:p/>
          </draw:image>
        </draw:frame>
        <draw:custom-shape draw:name="Text 8" draw:style-name="gr2" draw:text-style-name="P3" draw:layer="layout" svg:width="33.249cm" svg:height="2.522cm" svg:x="2.308cm" svg:y="2.541cm">
          <text:p text:style-name="P2"><text:span text:style-name="T1">EGX3</text:span><text:span text:style-name="T1">60 </text:span><text:span text:style-name="T1">The </text:span><text:span text:style-name="T1">Futur</text:span><text:span text:style-name="T1">e of </text:span><text:span text:style-name="T1">Intelli</text:span><text:span text:style-name="T1">gent </text:span><text:span text:style-name="T1">Tradi</text:span><text:span text:style-name="T1">ng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3" draw:text-style-name="P4" draw:layer="layout" svg:width="30.475cm" svg:height="0.067cm" svg:x="2.542cm" svg:y="5.0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4" draw:text-style-name="P5" draw:layer="layout" svg:width="21.271cm" svg:height="5.291cm" svg:x="2.205cm" svg:y="6.18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8" draw:style-name="gr5" draw:text-style-name="P5" draw:layer="layout" svg:width="10.835cm" svg:height="3.999cm" svg:x="15.182cm" svg:y="14.33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9" draw:style-name="gr6" draw:text-style-name="P5" draw:layer="layout" svg:width="10.194cm" svg:height="1.936cm" svg:x="15.188cm" svg:y="11.9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0" draw:style-name="gr7" draw:text-style-name="P7" draw:layer="layout" svg:width="17.477cm" svg:height="5.291cm" svg:x="2.205cm" svg:y="6.187cm">
          <text:p text:style-name="P6"><text:span text:style-name="T2">EGX360 is an AI-powered financial intelligence platform tracking </text:span><text:span text:style-name="T3">100+ </text:span><text:span text:style-name="T2">assets to simplify market analysis and empower Egyptian investor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8" draw:text-style-name="P8" draw:layer="layout" svg:width="5.756cm" svg:height="2.583cm" svg:x="2.498cm" svg:y="12.113cm">
          <text:p/>
          <draw:enhanced-geometry draw:mirror-horizontal="false" draw:mirror-vertical="false" svg:viewBox="0 0 0 0" draw:glue-points="?f8 0 0 ?f9 ?f8 ?f10 ?f11 ?f9" draw:text-areas="?f5 ?f5 ?f6 ?f7" draw:type="ooxml-roundRect" draw:modifiers="337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78" draw:style-name="gr9" draw:text-style-name="P5" draw:layer="layout" svg:width="10.573cm" svg:height="1.174cm" svg:x="3.131cm" svg:y="12.79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10" draw:text-style-name="P8" draw:layer="layout" svg:width="12.064cm" svg:height="4.898cm" svg:x="2.54cm" svg:y="15.242cm">
          <text:p/>
          <draw:enhanced-geometry draw:mirror-horizontal="false" draw:mirror-vertical="false" svg:viewBox="0 0 0 0" draw:glue-points="?f8 0 0 ?f9 ?f8 ?f10 ?f11 ?f9" draw:text-areas="?f5 ?f5 ?f6 ?f7" draw:type="ooxml-roundRect" draw:modifiers="337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79" draw:style-name="gr11" draw:text-style-name="P5" draw:layer="layout" svg:width="8.39cm" svg:height="2.991cm" svg:x="3.037cm" svg:y="15.24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2" draw:style-name="gr12" draw:text-style-name="P11" draw:layer="layout" svg:width="10.932cm" svg:height="3.629cm" svg:x="3.037cm" svg:y="15.876cm">
          <text:p text:style-name="P9"><text:span text:style-name="T4">Intelligence &amp; Experience</text:span></text:p>
          <text:p text:style-name="P10"><text:span text:style-name="T5">Live Tracking</text:span></text:p>
          <text:p text:style-name="P10"><text:span text:style-name="T5">AI Insights</text:span></text:p>
          <text:p text:style-name="P10"><text:span text:style-name="T6">Virtual Portfolio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3">
          <draw:frame draw:style-name="gr1" draw:text-style-name="P1" draw:layer="layout" svg:width="29.204cm" svg:height="28.569cm" svg:x="13.972cm" svg:y="-1.269cm">
            <draw:image xlink:href="Pictures/100000010000050000000500B3546261.png" xlink:type="simple" xlink:show="embed" xlink:actuate="onLoad" draw:mime-type="image/png">
              <text:p/>
            </draw:image>
          </draw:frame>
          <draw:g draw:style-name="gr14">
            <draw:frame draw:style-name="gr1" draw:text-style-name="P1" draw:layer="layout" svg:width="16.842cm" svg:height="10.152cm" svg:x="20.169cm" svg:y="7.62cm">
              <draw:image xlink:href="Pictures/1000000100000556000003006B82FE97.png" xlink:type="simple" xlink:show="embed" xlink:actuate="onLoad" draw:mime-type="image/png">
                <text:p/>
              </draw:image>
            </draw:frame>
            <draw:frame draw:name="Picture 2" draw:style-name="gr1" draw:text-style-name="P1" draw:layer="layout" svg:width="5.719cm" svg:height="10.647cm" svg:x="34.213cm" svg:y="9.05cm">
              <draw:image xlink:href="Pictures/10000001000002A100000500709971E2.png" xlink:type="simple" xlink:show="embed" xlink:actuate="onLoad" draw:mime-type="image/png">
                <text:p/>
              </draw:image>
            </draw:frame>
          </draw:g>
        </draw:g>
        <draw:custom-shape draw:style-name="gr15" draw:text-style-name="P12" draw:layer="layout" svg:width="4.523cm" svg:height="1.773cm" svg:x="3.177cm" svg:y="12.43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8" draw:text-style-name="P8" draw:layer="layout" svg:width="5.756cm" svg:height="2.583cm" svg:x="8.848cm" svg:y="12.113cm">
          <text:p/>
          <draw:enhanced-geometry draw:mirror-horizontal="false" draw:mirror-vertical="false" svg:viewBox="0 0 0 0" draw:glue-points="?f8 0 0 ?f9 ?f8 ?f10 ?f11 ?f9" draw:text-areas="?f5 ?f5 ?f6 ?f7" draw:type="ooxml-roundRect" draw:modifiers="337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style-name="gr16" draw:text-style-name="P14" draw:layer="layout" svg:width="5.395cm" svg:height="1.775cm" svg:x="9.168cm" svg:y="12.477cm">
          <text:p text:style-name="P13"><text:span text:style-name="T7">90%</text:span></text:p>
          <text:p text:style-name="P13"><text:span text:style-name="T7">AI ACCURA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14" draw:layer="layout" svg:width="5.395cm" svg:height="1.775cm" svg:x="2.859cm" svg:y="12.478cm">
          <text:p text:style-name="P13"><text:span text:style-name="T7">100+</text:span></text:p>
          <text:p text:style-name="P13"><text:span text:style-name="T7">LIVE ASSE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2" draw:style-name="dp1" draw:master-page-name="Default">
        <draw:g draw:style-name="gr13">
          <draw:frame draw:style-name="gr1" draw:text-style-name="P1" draw:layer="layout" svg:width="29.204cm" svg:height="28.569cm" svg:x="5.133cm" svg:y="-2.804cm">
            <draw:image xlink:href="Pictures/100000010000050000000500B3546261.png" xlink:type="simple" xlink:show="embed" xlink:actuate="onLoad" draw:mime-type="image/png">
              <text:p/>
            </draw:image>
          </draw:frame>
          <draw:g draw:style-name="gr14">
            <draw:frame draw:style-name="gr1" draw:text-style-name="P1" draw:layer="layout" svg:width="16.842cm" svg:height="10.152cm" svg:x="11.33cm" svg:y="6.085cm">
              <draw:image xlink:href="Pictures/1000000100000556000003006B82FE97.png" xlink:type="simple" xlink:show="embed" xlink:actuate="onLoad" draw:mime-type="image/png">
                <text:p/>
              </draw:image>
            </draw:frame>
            <draw:frame draw:name="Picture 2" draw:style-name="gr1" draw:text-style-name="P1" draw:layer="layout" svg:width="5.719cm" svg:height="10.647cm" svg:x="25.374cm" svg:y="7.515cm">
              <draw:image xlink:href="Pictures/10000001000002A100000500709971E2.png" xlink:type="simple" xlink:show="embed" xlink:actuate="onLoad" draw:mime-type="image/png">
                <text:p/>
              </draw:image>
            </draw:fram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M Sans" svg:font-family="'DM Sans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re Baskerville" svg:font-family="'Libre Baskerville'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5T21:09:13.279776835</meta:creation-date>
    <dc:date>2026-04-30T16:55:38.716063721</dc:date>
    <meta:editing-duration>PT36M26S</meta:editing-duration>
    <meta:editing-cycles>15</meta:editing-cycles>
    <meta:generator>LibreOffice/25.8.5.2$Linux_X86_64 LibreOffice_project/580$Build-2</meta:generator>
    <meta:print-date>2026-02-15T23:36:48.392216259</meta:print-date>
    <meta:printed-by>PDF files</meta:printed-by>
    <meta:document-statistic meta:object-count="26"/>
  </office:meta>
</office:document-meta>
</file>