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D000000A77075853A.png" manifest:media-type="image/png"/>
  <manifest:file-entry manifest:full-path="Pictures/10000001000004000000022F37247207.png" manifest:media-type="image/png"/>
  <manifest:file-entry manifest:full-path="Pictures/100000010000006D00000071EEE7C723.png" manifest:media-type="image/png"/>
  <manifest:file-entry manifest:full-path="Pictures/10000001000000A8000000661EADFF7B.png" manifest:media-type="image/png"/>
  <manifest:file-entry manifest:full-path="Pictures/100000010000050000000500B3546261.png" manifest:media-type="image/png"/>
  <manifest:file-entry manifest:full-path="Pictures/1000000100000556000003006B82FE97.png" manifest:media-type="image/png"/>
  <manifest:file-entry manifest:full-path="Pictures/10000001000000F7000000CCC66A5DED.png" manifest:media-type="image/png"/>
  <manifest:file-entry manifest:full-path="Pictures/10000001000002A100000500709971E2.png" manifest:media-type="image/png"/>
  <manifest:file-entry manifest:full-path="Pictures/10000000000006400000023E3D6D6698.png" manifest:media-type="image/png"/>
  <manifest:file-entry manifest:full-path="Pictures/100000010000018A00000185398704D0.png" manifest:media-type="image/png"/>
  <manifest:file-entry manifest:full-path="Pictures/100000010000094600000B13B56D15EB.png" manifest:media-type="image/png"/>
  <manifest:file-entry manifest:full-path="Pictures/1000000100000244000000A4E4F61432.png" manifest:media-type="image/png"/>
  <manifest:file-entry manifest:full-path="Pictures/10000001000001E70000008DA059785B.png" manifest:media-type="image/png"/>
  <manifest:file-entry manifest:full-path="Pictures/10000001000003B7000001C2690B4742.png" manifest:media-type="image/png"/>
  <manifest:file-entry manifest:full-path="Pictures/100000010000009C0000002CDD5EE35A.png" manifest:media-type="image/png"/>
  <manifest:file-entry manifest:full-path="Pictures/1000000100000174000000C2C522E9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um" svg:font-family="Medium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d4af37" draw:marker-start-width="0.457cm" draw:marker-end-width="0.457cm" draw:stroke-linejoin="round" draw:fill="solid" draw:fill-color="#fffdfa" draw:textarea-horizontal-align="center" draw:textarea-vertical-align="top" draw:auto-grow-height="false" draw:fit-to-size="false" style:shrink-to-fit="false" fo:min-height="4.193cm" fo:min-width="16.116cm" fo:padding-top="0.213cm" fo:padding-bottom="0.213cm" fo:padding-left="0.338cm" fo:padding-right="0.338cm" fo:wrap-option="wrap" loext:decorative="false"/>
    </style:style>
    <style:style style:name="gr2" style:family="graphic" style:parent-style-name="standard">
      <style:graphic-properties draw:fill="solid" draw:fill-color="#042c50" draw:textarea-horizontal-align="justify" draw:textarea-vertical-align="middle" draw:auto-grow-height="false" fo:min-height="10.91cm" fo:min-width="58.911cm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11.854cm, 0cm, 0cm)" draw:image-opacity="100%" style:mirror="none" loext:decorative="false"/>
    </style:style>
    <style:style style:name="gr4" style:family="graphic" style:parent-style-name="standard">
      <style:graphic-properties draw:stroke="none" draw:fill="none" draw:fill-color="#004586" draw:textarea-horizontal-align="center" fo:min-height="9.322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fill="solid" draw:fill-color="#042c50" draw:textarea-horizontal-align="justify" draw:textarea-vertical-align="middle" draw:auto-grow-height="false" fo:min-height="4.808cm" fo:min-width="58.911cm" loext:decorative="false"/>
    </style:style>
    <style:style style:name="gr7" style:family="graphic" style:parent-style-name="standard">
      <style:graphic-properties draw:stroke="none" draw:fill="none" draw:fill-color="#004586" fo:min-height="3.45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05cm" draw:shadow-offset-y="-0.05cm" draw:shadow-color="#000000" draw:shadow-opacity="30%" loext:shadow-blur="4.23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draw:fill="none" draw:textarea-horizontal-align="left" fo:min-height="3.419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85cm" svg:stroke-color="#d4af37" draw:stroke-linejoin="round" draw:fill="solid" draw:fill-color="#d4af37" draw:textarea-horizontal-align="center" draw:textarea-vertical-align="top" draw:auto-grow-height="false" draw:fit-to-size="false" style:shrink-to-fit="false" fo:min-height="2.962cm" fo:min-width="5.05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91cm" fo:min-width="10.311cm" fo:padding-top="0cm" fo:padding-bottom="0cm" fo:padding-left="0cm" fo:padding-right="0cm" fo:wrap-option="wrap" loext:decorative="false"/>
    </style:style>
    <style:style style:name="gr13" style:family="graphic" style:parent-style-name="standard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85cm" svg:stroke-color="#d4af37" draw:stroke-linejoin="round" draw:fill="solid" draw:fill-color="#004586" draw:textarea-horizontal-align="center" draw:textarea-vertical-align="top" draw:auto-grow-height="false" draw:fit-to-size="false" style:shrink-to-fit="false" fo:min-height="4.605cm" fo:min-width="18.599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textarea-horizontal-align="center" fo:min-height="5.03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4.116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2.471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541cm" fo:min-width="0cm" loext:decorative="false"/>
    </style:style>
    <style:style style:name="gr20" style:family="graphic" style:parent-style-name="standard">
      <style:graphic-properties draw:stroke="none" draw:fill="none" draw:textarea-horizontal-align="center" fo:min-height="3.15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center" fo:min-height="3.541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center" fo:min-height="1.895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3.15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5.004cm" draw:fill="none" draw:textarea-horizontal-align="center" fo:min-height="4.19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24.51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fo:min-height="12.757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12cm, 0cm, 0cm)" draw:image-opacity="100%" style:mirror="none"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cm, 16.247cm, 0.796cm, 0.66cm)" draw:image-opacity="100%" style:mirror="none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fo:min-height="3.151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fo:min-height="11.285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fo:min-height="14.326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cm, 0.551cm)" draw:image-opacity="100%" style:mirror="none" loext:decorative="false"/>
    </style:style>
    <style:style style:name="gr35" style:family="graphic" style:parent-style-name="standard" style:list-style-name="L1">
      <style:graphic-properties draw:stroke="none" draw:fill="none" fo:min-height="12.992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3cm, 0cm, 2.627cm, 0cm)" draw:image-opacity="100%" style:mirror="none" loext:decorative="false"/>
    </style:style>
    <style:style style:name="gr37" style:family="graphic" style:parent-style-name="standard">
      <style:graphic-properties draw:stroke="none" draw:fill="none" fo:min-height="4.83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cm, 4.603cm, 1.174cm, 1.489cm)" draw:image-opacity="100%" style:mirror="none" loext:decorative="false"/>
    </style:style>
    <style:style style:name="gr40" style:family="graphic" style:parent-style-name="Object_20_with_20_no_20_fill_20_and_20_no_20_line">
      <style:graphic-properties draw:textarea-vertical-align="bottom" fo:min-height="1.577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839cm" loext:decorative="false"/>
      <style:paragraph-properties style:writing-mode="lr-tb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5.215cm" loext:decorative="false"/>
    </style:style>
    <style:style style:name="gr43" style:family="graphic" style:parent-style-name="standard">
      <style:graphic-properties draw:stroke="none" draw:fill="none" fo:min-height="4.101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54cm, 1.08cm, 3.701cm, 0.834cm)" draw:image-opacity="100%" style:mirror="none" loext:decorative="fals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56cm, 0cm)" draw:image-opacity="100%" style:mirror="none" loext:decorative="false"/>
    </style:style>
    <style:style style:name="gr46" style:family="graphic" style:parent-style-name="standard">
      <style:graphic-properties draw:stroke="none" draw:fill="none" fo:min-height="3.076cm" loext:decorative="false"/>
      <style:paragraph-properties style:writing-mode="lr-tb"/>
    </style:style>
    <style:style style:name="P1" style:family="paragraph">
      <loext:graphic-properties draw:fill="solid" draw:fill-color="#fffdf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solid" draw:fill-color="#042c5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004586"/>
      <style:paragraph-properties fo:text-align="center"/>
      <style:text-properties fo:color="#d4af37" loext:opacity="100%" fo:font-size="40pt" style:font-size-asian="40pt" style:font-size-complex="40pt"/>
    </style:style>
    <style:style style:name="P7" style:family="paragraph">
      <loext:graphic-properties draw:fill="none" draw:fill-color="#004586"/>
      <style:text-properties fo:color="#d4af37" loext:opacity="100%" fo:font-size="40pt" style:font-size-asian="40pt" style:font-size-complex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 fo:text-align="start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solid" draw:fill-color="#d4af3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loext:graphic-properties draw:fill="solid" draw:fill-color="#00458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5" style:family="paragraph">
      <style:paragraph-properties fo:margin-left="0cm" fo:margin-right="0cm" fo:margin-top="0.42cm" fo:margin-bottom="0.35cm" fo:line-height="100%" fo:text-align="center" fo:text-indent="0cm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none"/>
      <style:paragraph-properties fo:margin-left="0cm" fo:margin-right="0cm" fo:margin-top="0.42cm" fo:margin-bottom="0.35cm" fo:line-height="100%" fo:text-align="center" fo:text-indent="0cm" style:writing-mode="lr-tb" style:font-independent-line-spacing="true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17" style:family="paragraph">
      <style:paragraph-properties fo:margin-left="0cm" fo:margin-right="0cm" fo:margin-top="0.1cm" fo:margin-bottom="0.1cm" fo:line-height="115%" fo:text-align="center" fo:text-indent="0cm"/>
    </style:style>
    <style:style style:name="P18" style:family="paragraph">
      <loext:graphic-properties draw:fill="none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none"/>
      <style:text-properties fo:font-size="40pt" style:font-size-asian="55pt" style:font-size-complex="55pt"/>
    </style:style>
    <style:style style:name="P20" style:family="paragraph">
      <loext:graphic-properties draw:fill="none"/>
      <style:text-properties fo:color="#ffffff" loext:opacity="100%" fo:font-size="40pt" style:font-size-asian="55pt" style:font-size-complex="55pt"/>
    </style:style>
    <style:style style:name="P21" style:family="paragraph">
      <style:paragraph-properties fo:text-align="center"/>
      <style:text-properties fo:font-size="40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fo:font-size="45pt" fo:font-weight="bold" style:font-size-asian="45pt" style:font-weight-asian="bold" style:font-size-complex="45pt" style:font-weight-complex="bold"/>
    </style:style>
    <style:style style:name="P24" style:family="paragraph">
      <loext:graphic-properties draw:fill="none"/>
      <style:paragraph-properties fo:text-align="center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="none"/>
      <style:paragraph-properties fo:text-align="center"/>
      <style:text-properties fo:color="#000000" loext:opacity="100%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fo:font-size="35pt" fo:font-weight="bold" style:font-size-asian="35pt" style:font-weight-asian="bold" style:font-size-complex="35pt" style:font-weight-complex="bold"/>
    </style:style>
    <style:style style:name="P28" style:family="paragraph">
      <style:paragraph-properties fo:margin-left="0cm" fo:margin-right="0cm" fo:margin-top="0.12cm" fo:margin-bottom="0.05cm" fo:line-height="115%" fo:text-align="start" fo:text-indent="0cm"/>
    </style:style>
    <style:style style:name="P29" style:family="paragraph">
      <style:paragraph-properties fo:margin-left="0cm" fo:margin-right="0cm" fo:margin-top="0.02cm" fo:margin-bottom="0cm" fo:line-height="115%" fo:text-align="start" fo:text-indent="0cm"/>
    </style:style>
    <style:style style:name="P30" style:family="paragraph">
      <style:paragraph-properties fo:margin-left="0cm" fo:margin-right="0cm" fo:margin-top="0.12cm" fo:margin-bottom="0.05cm" fo:line-height="150%" fo:text-align="start" fo:text-indent="0cm"/>
    </style:style>
    <style:style style:name="P31" style:family="paragraph">
      <style:paragraph-properties fo:margin-left="0cm" fo:margin-right="0cm" fo:margin-top="0.42cm" fo:margin-bottom="0.35cm" fo:line-height="115%" fo:text-align="start" fo:text-indent="0cm"/>
    </style:style>
    <style:style style:name="P32" style:family="paragraph">
      <loext:graphic-properties draw:fill="none"/>
      <style:paragraph-properties fo:margin-left="0cm" fo:margin-right="0cm" fo:margin-top="0.12cm" fo:margin-bottom="0.05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62cm" fo:margin-bottom="0.55cm" fo:line-height="100%" fo:text-indent="0cm"/>
    </style:style>
    <style:style style:name="P34" style:family="paragraph">
      <loext:graphic-properties draw:fill="none"/>
      <style:paragraph-properties fo:margin-left="0cm" fo:margin-right="0cm" fo:margin-top="0.62cm" fo:margin-bottom="0.5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36" style:family="paragraph">
      <style:paragraph-properties fo:margin-left="0cm" fo:margin-right="0cm" fo:margin-top="0.52cm" fo:margin-bottom="0.45cm" fo:line-height="115%" fo:text-indent="0cm"/>
    </style:style>
    <style:style style:name="P37" style:family="paragraph">
      <loext:graphic-properties draw:fill="none"/>
      <style:paragraph-properties fo:margin-left="0cm" fo:margin-right="0cm" fo:margin-top="0.42cm" fo:margin-bottom="0.35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.5cm" fo:margin-bottom="0.5cm" fo:line-height="100%" fo:text-indent="0cm"/>
    </style:style>
    <style:style style:name="P39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.42cm" fo:margin-bottom="0.35cm" fo:line-height="100%" fo:text-align="center" fo:text-indent="0cm"/>
    </style:style>
    <style:style style:name="P41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4" style:family="paragraph">
      <loext:graphic-properties draw:fill="none"/>
      <style:text-properties fo:color="#000000" loext:opacity="100%" fo:font-size="28pt" style:font-size-asian="28pt" style:font-size-complex="28pt"/>
    </style:style>
    <style:style style:name="P45" style:family="paragraph">
      <loext:graphic-properties draw:fill="none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style:paragraph-properties fo:margin-top="0.42cm" fo:margin-bottom="0.35cm"/>
    </style:style>
    <style:style style:name="P48" style:family="paragraph">
      <loext:graphic-properties draw:fill="none"/>
      <style:paragraph-properties fo:margin-top="0.42cm" fo:margin-bottom="0.35cm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/>
      <style:paragraph-properties fo:margin-top="0.42cm" fo:margin-bottom="0.35cm"/>
      <style:text-properties fo:color="#000000" loext:opacity="100%" fo:font-size="26pt" fo:font-weight="bold" style:font-size-asian="10pt" style:font-weight-asian="bold" style:font-size-complex="10pt" style:font-weight-complex="bold"/>
    </style:style>
    <style:style style:name="P50" style:family="paragraph">
      <loext:graphic-properties draw:fill="none"/>
      <style:paragraph-properties fo:margin-top="0.42cm" fo:margin-bottom="0.35cm"/>
      <style:text-properties fo:color="#000000" loext:opacity="100%" fo:font-size="26pt" style:font-size-asian="10pt" style:font-size-complex="10pt"/>
    </style:style>
    <style:style style:name="T1" style:family="text">
      <style:text-properties fo:color="#d4af37" loext:opacity="100%" style:font-name="Montserrat" fo:font-size="56pt" fo:font-weight="bold" fo:background-color="transparent" style:font-size-asian="56pt" style:font-weight-asian="bold" style:font-size-complex="56pt" style:font-weight-complex="bold"/>
    </style:style>
    <style:style style:name="T2" style:family="text">
      <style:text-properties fo:color="#ffffff" loext:opacity="100%" style:font-name="Montserrat" fo:font-size="56pt" fo:font-weight="bold" fo:background-color="transparent" style:font-size-asian="56pt" style:font-weight-asian="bold" style:font-size-complex="56pt" style:font-weight-complex="bold"/>
    </style:style>
    <style:style style:name="T3" style:family="text">
      <style:text-properties fo:color="#ffffff" loext:opacity="100%" style:font-name="Montserrat" fo:font-size="56pt" fo:font-weight="normal" fo:background-color="transparent" style:font-size-asian="56pt" style:font-weight-asian="normal" style:font-size-complex="56pt" style:font-weight-complex="normal"/>
    </style:style>
    <style:style style:name="T4" style:family="text">
      <style:text-properties fo:color="#ffffff" loext:opacity="100%" style:font-name="Medium" fo:font-size="56pt" fo:font-weight="normal" fo:background-color="transparent" style:font-size-asian="56pt" style:font-weight-asian="normal" style:font-size-complex="56pt" style:font-weight-complex="normal"/>
    </style:style>
    <style:style style:name="T5" style:family="text">
      <style:text-properties fo:color="#ffffff" loext:opacity="100%" style:font-name="Medium" fo:font-size="54pt" fo:font-weight="normal" fo:background-color="transparent" style:font-size-asian="54pt" style:font-weight-asian="normal" style:font-size-complex="54pt" style:font-weight-complex="normal"/>
    </style:style>
    <style:style style:name="T6" style:family="text">
      <style:text-properties fo:color="#d4af37" loext:opacity="100%" style:font-name="Medium" fo:font-size="40pt" fo:font-weight="normal" fo:background-color="transparent" style:font-size-asian="40pt" style:font-weight-asian="normal" style:font-size-complex="40pt" style:font-weight-complex="normal"/>
    </style:style>
    <style:style style:name="T7" style:family="text">
      <style:text-properties fo:color="#d4af37" loext:opacity="100%" style:font-name="Medium" fo:font-size="40pt" fo:font-weight="bold" fo:background-color="transparent" style:font-size-asian="40pt" style:font-weight-asian="bold" style:font-size-complex="40pt" style:font-weight-complex="bold"/>
    </style:style>
    <style:style style:name="T8" style:family="text">
      <style:text-properties fo:color="#d4af37" loext:opacity="100%" fo:font-size="40pt" style:font-size-asian="40pt" style:font-size-complex="40pt"/>
    </style:style>
    <style:style style:name="T9" style:family="text"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variant="normal" fo:text-transform="none" fo:color="#d4af37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2" style:family="text">
      <style:text-properties fo:font-variant="normal" fo:text-transform="none" fo:color="#d4af37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0pt" style:font-style-asian="normal" style:font-weight-asian="bold" style:font-name-complex="Noto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d32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size-complex="55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55pt" style:font-style-asian="normal" style:font-weight-asian="bold" style:font-name-complex="Noto Sans Devanagari" style:font-size-complex="5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45pt" fo:font-weight="bold" style:font-size-asian="45pt" style:font-weight-asian="bold" style:font-size-complex="45pt" style:font-weight-complex="bold"/>
    </style:style>
    <style:style style:name="T17" style:family="text">
      <style:text-properties fo:color="#000000" loext:opacity="100%" fo:font-size="40pt" fo:font-weight="bold" fo:background-color="transparent" style:font-size-asian="40pt" style:font-weight-asian="bold" style:font-size-complex="40pt" style:font-weight-complex="bold"/>
    </style:style>
    <style:style style:name="T18" style:family="text">
      <style:text-properties fo:color="#000000" loext:opacity="100%" fo:font-size="35pt" fo:font-weight="bold" style:font-size-asian="35pt" style:font-weight-asian="bold" style:font-size-complex="35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pt" fo:font-style="normal" fo:text-shadow="none" style:text-underline-style="none" fo:font-weight="bold" style:letter-kerning="true" style:font-name-asian="Noto Sans CJK SC" style:font-size-asian="2pt" style:font-style-asian="normal" style:font-weight-asian="bold" style:font-name-complex="Noto Sans Devanagari" style:font-size-complex="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0pt" fo:font-style="normal" fo:text-shadow="1pt 1pt" style:text-underline-style="none" fo:font-weight="bold" style:letter-kerning="true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Noto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000000" loext:opacity="100%" fo:font-size="26pt" fo:font-weight="bold" style:font-size-asian="10pt" style:font-weight-asian="bold" style:font-size-complex="10pt" style:font-weight-complex="bold"/>
    </style:style>
    <style:style style:name="T28" style:family="text">
      <style:text-properties fo:color="#000000" loext:opacity="100%" fo:font-size="26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c4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2" draw:style-name="gr1" draw:text-style-name="P1" draw:layer="layout" svg:width="16.884cm" svg:height="4.711cm" svg:x="41.269cm" svg:y="72.755cm">
          <text:p/>
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style-name="gr2" draw:text-style-name="P2" draw:layer="layout" svg:width="59.411cm" svg:height="11.1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0.477cm" svg:height="9.999cm" svg:x="1.635cm" svg:y="1.161cm">
          <draw:image xlink:href="Pictures/10000001000001E70000008DA059785B.png" xlink:type="simple" xlink:show="embed" xlink:actuate="onLoad" draw:mime-type="image/png">
            <text:p/>
          </draw:image>
        </draw:frame>
        <draw:frame draw:style-name="gr4" draw:text-style-name="P6" draw:layer="layout" svg:width="39.052cm" svg:height="9.572cm" svg:x="15.287cm" svg:y="1.588cm">
          <draw:text-box>
            <text:p text:style-name="P4"><text:span text:style-name="T1">EGX360</text:span><text:span text:style-name="T2"> - </text:span><text:span text:style-name="T3">Intelligent</text:span><text:span text:style-name="T4"> Stock</text:span></text:p>
            <text:p text:style-name="P5"><text:span text:style-name="T5">Market Analysis and Forecasting Platform</text:span></text:p>
            <text:p text:style-name="P4"><text:span text:style-name="T6">AI-Powered EGX30 Forecasting Platform</text:span><text:span text:style-name="T7"> </text:span></text:p>
          </draw:text-box>
        </draw:frame>
        <draw:g draw:style-name="gr5">
          <draw:custom-shape draw:style-name="gr6" draw:text-style-name="P2" draw:layer="layout" svg:width="59.411cm" svg:height="5.058cm" svg:x="0cm" svg:y="79.02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55.057cm" svg:height="3.703cm" svg:x="0.553cm" svg:y="80.396cm">
            <draw:text-box>
              <text:p><text:span text:style-name="T8">King Salman International University - El Tor Campus - South Sinai | www.ksiu.edua.eg</text:span></text:p>
            </draw:text-box>
          </draw:frame>
        </draw:g>
        <draw:g draw:style-name="gr5">
          <draw:frame draw:style-name="gr8" draw:text-style-name="P8" draw:layer="layout" svg:width="28.893cm" svg:height="29.528cm" svg:x="15.922cm" svg:y="7.667cm">
            <draw:image xlink:href="Pictures/100000010000050000000500B3546261.png" xlink:type="simple" xlink:show="embed" xlink:actuate="onLoad" draw:mime-type="image/png">
              <text:p/>
            </draw:image>
          </draw:frame>
          <draw:g draw:style-name="gr9">
            <draw:frame draw:style-name="gr8" draw:text-style-name="P8" draw:layer="layout" svg:width="16.711cm" svg:height="10.563cm" svg:x="22.07cm" svg:y="16.777cm">
              <draw:image xlink:href="Pictures/1000000100000556000003006B82FE97.png" xlink:type="simple" xlink:show="embed" xlink:actuate="onLoad" draw:mime-type="image/png">
                <text:p/>
              </draw:image>
            </draw:frame>
            <draw:frame draw:name="Picture 2" draw:style-name="gr8" draw:text-style-name="P8" draw:layer="layout" svg:width="5.678cm" svg:height="11.08cm" svg:x="36.003cm" svg:y="18.262cm">
              <draw:image xlink:href="Pictures/10000001000002A100000500709971E2.png" xlink:type="simple" xlink:show="embed" xlink:actuate="onLoad" draw:mime-type="image/png">
                <text:p/>
              </draw:image>
            </draw:frame>
          </draw:g>
        </draw:g>
        <draw:frame draw:style-name="gr10" draw:text-style-name="P10" draw:layer="layout" svg:width="46.457cm" svg:height="3.669cm" svg:x="22.17cm" svg:y="33.067cm">
          <draw:text-box>
            <text:p text:style-name="P9"><text:span text:style-name="T9">Results &amp; Performance</text:span></text:p>
          </draw:text-box>
        </draw:frame>
        <draw:g draw:style-name="gr5">
          <draw:custom-shape draw:name="Shape 9" draw:style-name="gr11" draw:text-style-name="P11" draw:layer="layout" svg:width="5.614cm" svg:height="3.276cm" svg:x="25.445cm" svg:y="35.316cm">
            <text:p/>
  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 78" draw:style-name="gr12" draw:text-style-name="P12" draw:layer="layout" svg:width="10.31cm" svg:height="1.49cm" svg:x="23.721cm" svg:y="36.832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3" draw:layer="layout" svg:width="4.409cm" svg:height="2.25cm" svg:x="26.063cm" svg:y="35.559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" draw:style-name="gr14" draw:text-style-name="P14" draw:layer="layout" svg:width="19.197cm" svg:height="4.953cm" svg:x="21.183cm" svg:y="35.29cm">
            <text:p/>
            <draw:enhanced-geometry draw:mirror-horizontal="false" draw:mirror-vertical="false" svg:viewBox="0 0 0 0" draw:glue-points="?f8 0 0 ?f9 ?f8 ?f10 ?f11 ?f9" draw:text-areas="?f5 ?f5 ?f6 ?f7" draw:type="ooxml-roundRect" draw:modifiers="337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15" draw:text-style-name="P16" draw:layer="layout" svg:width="10.057cm" svg:height="3.211cm" svg:x="20.918cm" svg:y="38.261cm">
            <text:p text:style-name="P15"><text:span text:style-name="T10">Backtest Alpha</text:span></text:p>
            <text:p text:style-name="P15"><text:span text:style-name="T11"/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" draw:text-style-name="P18" draw:layer="layout" svg:width="23.046cm" svg:height="5.289cm" svg:x="23.59cm" svg:y="38.256cm">
            <draw:text-box>
              <text:p text:style-name="P17"><text:span text:style-name="T12">Model Accuracy</text:span></text:p>
              <text:p text:style-name="P17"><text:span text:style-name="T13"/></text:p>
            </draw:text-box>
          </draw:frame>
          <draw:frame draw:style-name="gr17" draw:text-style-name="P19" draw:layer="layout" svg:width="9.295cm" svg:height="4.366cm" svg:x="22.837cm" svg:y="36.079cm">
            <draw:text-box>
              <text:p><text:span text:style-name="T14">+159.09%</text:span></text:p>
            </draw:text-box>
          </draw:frame>
          <draw:frame draw:style-name="gr18" draw:text-style-name="P20" draw:layer="layout" svg:width="5.323cm" svg:height="2.721cm" svg:x="32.861cm" svg:y="36.079cm">
            <draw:text-box>
              <text:p><text:span text:style-name="T15">90%</text:span></text:p>
            </draw:text-box>
          </draw:frame>
          <draw:custom-shape draw:style-name="gr19" draw:text-style-name="P21" draw:layer="layout" svg:width="0.103cm" svg:height="2.791cm" svg:x="30.458cm" svg:y="35.9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23" draw:layer="layout" svg:width="19.6cm" svg:height="3.401cm" svg:x="1cm" svg:y="13.382cm">
          <draw:text-box>
            <text:p text:style-name="P22"><text:span text:style-name="T16">Aim&amp; Rationale </text:span></text:p>
          </draw:text-box>
        </draw:frame>
        <draw:frame draw:style-name="gr21" draw:text-style-name="P24" draw:layer="layout" svg:width="17.462cm" svg:height="3.791cm" svg:x="21.955cm" svg:y="13.382cm">
          <draw:text-box>
            <text:p text:style-name="P4"><text:span text:style-name="T9">Adaptive </text:span><text:span text:style-name="T9">Dashboard</text:span></text:p>
          </draw:text-box>
        </draw:frame>
        <draw:frame draw:style-name="gr22" draw:text-style-name="P25" draw:layer="layout" svg:width="18.473cm" svg:height="2.145cm" svg:x="1.635cm" svg:y="28.223cm">
          <draw:text-box>
            <text:p text:style-name="P4"><text:span text:style-name="T9">System Architecture</text:span></text:p>
          </draw:text-box>
        </draw:frame>
        <draw:frame draw:style-name="gr23" draw:text-style-name="P26" draw:layer="layout" svg:width="17.639cm" svg:height="3.401cm" svg:x="40.705cm" svg:y="40.511cm">
          <draw:text-box>
            <text:p text:style-name="P22"><text:span text:style-name="T17">Future Work</text:span></text:p>
          </draw:text-box>
        </draw:frame>
        <draw:frame draw:style-name="gr24" draw:text-style-name="P27" draw:layer="layout" svg:width="19.536cm" svg:height="4.445cm" svg:x="20.918cm" svg:y="67.357cm">
          <draw:text-box>
            <text:p text:style-name="P22"><text:span text:style-name="T18"><text:s/>Download EGX360</text:span></text:p>
          </draw:text-box>
        </draw:frame>
        <draw:frame draw:style-name="gr25" draw:text-style-name="P32" draw:layer="layout" svg:width="16.51cm" svg:height="24.765cm" svg:x="42.275cm" svg:y="15.922cm">
          <draw:text-box>
            <text:p text:style-name="P28"><text:span text:style-name="T19">Technical Expertise</text:span></text:p>
            <text:list text:style-name="L1">
              <text:list-item>
                <text:p text:style-name="P28"><text:span text:style-name="T19">Stacking</text:span><text:span text:style-name="T20">: Optimized XGBoost &amp; LightGBM base learners.</text:span></text:p>
              </text:list-item>
              <text:list-item>
                <text:p text:style-name="P28"><text:span text:style-name="T19">Optuna</text:span><text:span text:style-name="T20">: Bayesian optimization for robust model stability</text:span></text:p>
              </text:list-item>
              <text:list-item>
                <text:p text:style-name="P29"><text:span text:style-name="T19">Cloud: </text:span><text:span text:style-name="T20">AWS &amp; Supabase deployment.</text:span></text:p>
              </text:list-item>
            </text:list>
            <text:p text:style-name="P30"><text:span text:style-name="T19">Core Knowledge</text:span></text:p>
            <text:list text:continue-numbering="true" text:style-name="L1">
              <text:list-item>
                <text:p text:style-name="P29"><text:span text:style-name="T19">Quant: </text:span><text:span text:style-name="T20">Technical &amp; Macro correlations.</text:span></text:p>
              </text:list-item>
              <text:list-item>
                <text:p text:style-name="P29"><text:span text:style-name="T19">NLP: </text:span><text:span text:style-name="T20">Hugging Face sentiment analysis.</text:span></text:p>
              </text:list-item>
              <text:list-item>
                <text:p text:style-name="P29"><text:span text:style-name="T19">Risk: </text:span><text:span text:style-name="T20">Automated stop-loss rules.</text:span></text:p>
              </text:list-item>
            </text:list>
            <text:p text:style-name="P31"><text:span text:style-name="T19">Problem Solving</text:span></text:p>
            <text:list text:continue-numbering="true" text:style-name="L1">
              <text:list-item>
                <text:p text:style-name="P31"><text:span text:style-name="T19">Data Bias</text:span><text:span text:style-name="T20">: Strict chronological splitting</text:span></text:p>
              </text:list-item>
              <text:list-item>
                <text:p text:style-name="P31"><text:span text:style-name="T19">Noise</text:span><text:span text:style-name="T20">: EMA10 signal smoothing.</text:span></text:p>
              </text:list-item>
            </text:list>
          </draw:text-box>
        </draw:frame>
        <draw:frame draw:style-name="gr26" draw:text-style-name="P34" draw:layer="layout" svg:width="14.303cm" svg:height="13.007cm" svg:x="5.127cm" svg:y="16.24cm">
          <draw:text-box>
            <text:p text:style-name="P33"><text:span text:style-name="T19">The Problem: </text:span><text:span text:style-name="T20">Egypt's retail </text:span><text:span text:style-name="T20">investors make decisions with no </text:span><text:span text:style-name="T20">real AI support.</text:span></text:p>
            <text:p text:style-name="P33"><text:span text:style-name="T19">The Goal: </text:span><text:span text:style-name="T20">EGX360 predicts</text:span><text:span text:style-name="T21">ز</text:span><text:span text:style-name="T21"> </text:span><text:span text:style-name="T20">market moves before they </text:span><text:span text:style-name="T20">happen — with 90% accuracy</text:span></text:p>
            <text:p text:style-name="P33"><text:span text:style-name="T19">Rationale:</text:span><text:span text:style-name="T20"> Built on AWS cloud — </text:span><text:span text:style-name="T20">scales to any market, any </text:span><text:span text:style-name="T20">volume, in real time.</text:span></text:p>
          </draw:text-box>
        </draw:frame>
        <draw:frame draw:style-name="gr27" draw:text-style-name="P3" draw:layer="layout" svg:width="6.667cm" svg:height="6.582cm" svg:x="27.988cm" svg:y="70.618cm">
          <draw:image xlink:href="Pictures/100000010000018A00000185398704D0.png" xlink:type="simple" xlink:show="embed" xlink:actuate="onLoad" draw:mime-type="image/png">
            <text:p/>
          </draw:image>
        </draw:frame>
        <draw:frame draw:style-name="gr28" draw:text-style-name="P3" draw:layer="layout" svg:width="2.712cm" svg:height="1.446cm" svg:x="22.312cm" svg:y="30.034cm">
          <draw:image xlink:href="Pictures/10000001000000A8000000661EADFF7B.png" xlink:type="simple" xlink:show="embed" xlink:actuate="onLoad" draw:mime-type="image/png">
            <text:p/>
          </draw:image>
        </draw:frame>
        <draw:frame draw:style-name="gr27" draw:text-style-name="P3" draw:layer="layout" svg:width="1.827cm" svg:height="1.827cm" svg:x="25.843cm" svg:y="29.653cm">
          <draw:image xlink:href="Pictures/100000010000006D00000071EEE7C723.png" xlink:type="simple" xlink:show="embed" xlink:actuate="onLoad" draw:mime-type="image/png">
            <text:p/>
          </draw:image>
        </draw:frame>
        <draw:frame draw:style-name="gr29" draw:text-style-name="P3" draw:layer="layout" svg:width="2.048cm" svg:height="1.649cm" svg:x="28.479cm" svg:y="29.831cm">
          <draw:image xlink:href="Pictures/100000010000009C0000002CDD5EE35A.png" xlink:type="simple" xlink:show="embed" xlink:actuate="onLoad" draw:mime-type="image/png">
            <text:p/>
          </draw:image>
        </draw:frame>
        <draw:frame draw:style-name="gr30" draw:text-style-name="P3" draw:layer="layout" svg:width="1.588cm" svg:height="1.777cm" svg:x="31.162cm" svg:y="29.703cm">
          <draw:image xlink:href="Pictures/1000000100000244000000A4E4F61432.png" xlink:type="simple" xlink:show="embed" xlink:actuate="onLoad" draw:mime-type="image/png">
            <text:p/>
          </draw:image>
        </draw:frame>
        <draw:frame draw:style-name="gr31" draw:text-style-name="P35" draw:layer="layout" svg:width="19.592cm" svg:height="3.401cm" svg:x="2.045cm" svg:y="63.23cm">
          <draw:text-box>
            <text:p text:style-name="P9"><text:span text:style-name="T9">Data Processing Lifecycle</text:span></text:p>
          </draw:text-box>
        </draw:frame>
        <draw:frame draw:style-name="gr32" draw:text-style-name="P37" draw:layer="layout" svg:width="17.439cm" svg:height="11.535cm" svg:x="2.293cm" svg:y="66.087cm">
          <draw:text-box>
            <text:p text:style-name="P36"><text:span text:style-name="T19">Ingestion</text:span><text:span text:style-name="T20">: Daily ingestion of raw historical &amp; news data from EGX.</text:span></text:p>
            <text:p text:style-name="P36"><text:span text:style-name="T19">Preprocessing</text:span><text:span text:style-name="T20">: Optuna-optimized EMA, RSI, and volatility feature.</text:span></text:p>
            <text:p text:style-name="P36"><text:span text:style-name="T19">Prediction</text:span><text:span text:style-name="T20">: Stacking Ensemble analysis (XGBoost + LightGBM).</text:span></text:p>
            <text:p text:style-name="P36"><text:span text:style-name="T19">Signal Delivery:</text:span><text:span text:style-name="T20"> Generates and delivers actionable BUY/SELL signals.</text:span></text:p>
          </draw:text-box>
        </draw:frame>
        <draw:frame draw:style-name="gr33" draw:text-style-name="P39" draw:layer="layout" svg:width="15.535cm" svg:height="14.576cm" svg:x="41.927cm" svg:y="43.012cm">
          <draw:text-box>
            <text:p text:style-name="P38"><text:span text:style-name="T19">Live Brokerage Integration</text:span><text:span text:style-name="T20">: Migrating from paper-trading to real-world execution via local brokerage APIs for automated trade execution.</text:span></text:p>
            <text:p text:style-name="P38"><text:span text:style-name="T19">Multi-Index Expansion</text:span><text:span text:style-name="T20">: Adapting the Stacking Ensemble model to forecast broader indices like EGX70 and EGX100 for diversified stock </text:span></text:p>
            <text:p text:style-name="P38"><text:span text:style-name="T19">SHAP-Based Explainability</text:span><text:span text:style-name="T20">: Utilizing Explainable AI (XAI) to show users exactly how macroeconomic factors influenced each signal.</text:span></text:p>
          </draw:text-box>
        </draw:frame>
        <draw:frame draw:style-name="gr34" draw:text-style-name="P3" draw:layer="layout" svg:width="15.012cm" svg:height="9.525cm" svg:x="60.283cm" svg:y="51.165cm">
          <draw:image xlink:href="Pictures/1000000100000174000000C2C522E926.png" xlink:type="simple" xlink:show="embed" xlink:actuate="onLoad" draw:mime-type="image/png">
            <text:p/>
          </draw:image>
        </draw:frame>
        <draw:frame draw:style-name="gr23" draw:text-style-name="P41" draw:layer="layout" svg:width="17.465cm" svg:height="3.401cm" svg:x="40.946cm" svg:y="13.156cm">
          <draw:text-box>
            <text:p text:style-name="P40"><text:span text:style-name="T9">Lessons Learned</text:span></text:p>
          </draw:text-box>
        </draw:frame>
        <draw:frame draw:style-name="gr35" draw:text-style-name="P43" draw:layer="layout" svg:width="15.443cm" svg:height="13.242cm" svg:x="41.957cm" svg:y="60.783cm">
          <draw:text-box>
            <text:p text:style-name="P42"><text:span text:style-name="T22">EGX360 achieves 90% accuracy by synergizing Egypt-specific macroeconomic indicators with a robust Stacking Ensemble. This project bridges the gap between raw data and actionable intelligence, providing retail investors with a production-ready tool for market volatility.a</text:span></text:p>
          </draw:text-box>
        </draw:frame>
        <draw:frame draw:style-name="gr36" draw:text-style-name="P3" draw:layer="layout" svg:width="18.203cm" svg:height="7.853cm" svg:x="21.637cm" svg:y="57.282cm">
          <draw:image xlink:href="Pictures/10000000000006400000023E3D6D6698.png" xlink:type="simple" xlink:show="embed" xlink:actuate="onLoad" draw:mime-type="image/png">
            <text:p/>
          </draw:image>
        </draw:frame>
        <draw:frame draw:style-name="gr37" draw:text-style-name="P44" draw:layer="layout" svg:width="17.754cm" svg:height="5.08cm" svg:x="41.657cm" svg:y="73.39cm">
          <draw:text-box>
            <text:p text:style-name="P38"><text:span text:style-name="T23">Presented by: Mohamed Taher Amin</text:span><text:span text:style-name="T23"><text:line-break/></text:span><text:span text:style-name="T23">Supervisor: Dr. Samy Abdelnabi</text:span><text:span text:style-name="T23"><text:line-break/></text:span><text:span text:style-name="T23">Assistant: ENG: AbdulAziz</text:span></text:p>
          </draw:text-box>
        </draw:frame>
        <draw:frame draw:style-name="gr38" draw:text-style-name="P25" draw:layer="layout" svg:width="17.683cm" svg:height="1.827cm" svg:x="40.624cm" svg:y="58.15cm">
          <draw:text-box>
            <text:p text:style-name="P4"><text:span text:style-name="T9">Conclusion</text:span></text:p>
          </draw:text-box>
        </draw:frame>
        <draw:frame draw:style-name="gr39" draw:text-style-name="P3" draw:layer="layout" svg:width="20.273cm" svg:height="10.795cm" svg:x="20.918cm" svg:y="43.545cm">
          <draw:image xlink:href="Pictures/10000001000003B7000001C2690B4742.png" xlink:type="simple" xlink:show="embed" xlink:actuate="onLoad" draw:mime-type="image/png">
            <text:p/>
          </draw:image>
        </draw:frame>
        <draw:frame draw:style-name="gr40" draw:text-style-name="P5" draw:layer="layout" svg:width="5.127cm" svg:height="1.827cm" svg:x="3.175cm" svg:y="20.763cm">
          <draw:text-box>
            <text:p text:style-name="P5"><text:span text:style-name="T24">🎯</text:span></text:p>
          </draw:text-box>
        </draw:frame>
        <draw:frame draw:style-name="gr41" draw:text-style-name="P45" draw:layer="layout" svg:width="5.117cm" svg:height="2.089cm" svg:x="3.185cm" svg:y="24.255cm">
          <draw:text-box>
            <text:p text:style-name="P42"><text:span text:style-name="T25">⚡</text:span><text:span text:style-name="T21">ز</text:span></text:p>
          </draw:text-box>
        </draw:frame>
        <draw:frame draw:style-name="gr38" draw:text-style-name="P45" draw:layer="layout" svg:width="3.042cm" svg:height="1.827cm" svg:x="3.038cm" svg:y="16.635cm">
          <draw:text-box>
            <text:p><text:span text:style-name="T25">⚠️ <text:s/></text:span></text:p>
          </draw:text-box>
        </draw:frame>
        <draw:frame draw:style-name="gr27" draw:text-style-name="P3" draw:layer="layout" svg:width="18.644cm" svg:height="23.301cm" svg:x="1.635cm" svg:y="30.404cm">
          <draw:image xlink:href="Pictures/100000010000094600000B13B56D15EB.png" xlink:type="simple" xlink:show="embed" xlink:actuate="onLoad" draw:mime-type="image/png">
            <text:p/>
          </draw:image>
        </draw:frame>
        <draw:custom-shape draw:style-name="gr42" draw:text-style-name="P46" draw:layer="layout" svg:width="5.715cm" svg:height="0.953cm" svg:x="10.207cm" svg:y="52.11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1.905cm" svg:height="1.016cm" svg:x="10.525cm" svg:y="52.117cm">
          <draw:image xlink:href="Pictures/10000001000000A8000000661EADFF7B.png" xlink:type="simple" xlink:show="embed" xlink:actuate="onLoad" draw:mime-type="image/png">
            <text:p/>
          </draw:image>
        </draw:frame>
        <draw:frame draw:style-name="gr27" draw:text-style-name="P3" draw:layer="layout" svg:width="1.27cm" svg:height="1.27cm" svg:x="13.382cm" svg:y="51.927cm">
          <draw:image xlink:href="Pictures/100000010000006D00000071EEE7C723.png" xlink:type="simple" xlink:show="embed" xlink:actuate="onLoad" draw:mime-type="image/png">
            <text:p/>
          </draw:image>
        </draw:frame>
        <draw:frame draw:style-name="gr43" draw:text-style-name="P48" draw:layer="layout" svg:width="12.094cm" svg:height="4.351cm" svg:x="1.635cm" svg:y="54.452cm">
          <draw:text-box>
            <text:p text:style-name="P47"><text:span text:style-name="T26">Stacking Ensemble</text:span></text:p>
          </draw:text-box>
        </draw:frame>
        <draw:frame draw:style-name="gr44" draw:text-style-name="P3" draw:layer="layout" svg:width="18.711cm" svg:height="7.937cm" svg:x="1.339cm" svg:y="55.61cm">
          <draw:image xlink:href="Pictures/10000001000004000000022F37247207.png" xlink:type="simple" xlink:show="embed" xlink:actuate="onLoad" draw:mime-type="image/png">
            <text:p/>
          </draw:image>
        </draw:frame>
        <draw:frame draw:style-name="gr45" draw:text-style-name="P3" draw:layer="layout" svg:width="2.851cm" svg:height="1.719cm" svg:x="33.702cm" svg:y="29.761cm">
          <draw:image xlink:href="Pictures/10000001000000F7000000CCC66A5DED.png" xlink:type="simple" xlink:show="embed" xlink:actuate="onLoad" draw:mime-type="image/png">
            <text:p/>
          </draw:image>
        </draw:frame>
        <draw:frame draw:style-name="gr27" draw:text-style-name="P3" draw:layer="layout" svg:width="3.23cm" svg:height="1.792cm" svg:x="36.822cm" svg:y="29.688cm">
          <draw:image xlink:href="Pictures/100000010000012D000000A77075853A.png" xlink:type="simple" xlink:show="embed" xlink:actuate="onLoad" draw:mime-type="image/png">
            <text:p/>
          </draw:image>
        </draw:frame>
        <draw:frame draw:style-name="gr46" draw:text-style-name="P49" draw:layer="layout" svg:width="16.735cm" svg:height="3.326cm" svg:x="21.095cm" svg:y="55.459cm">
          <draw:text-box>
            <text:p text:style-name="P47"><text:span text:style-name="T27">Results &amp; Benchmark Comparison</text:span></text:p>
          </draw:text-box>
        </draw:frame>
        <draw:frame draw:style-name="gr43" draw:text-style-name="P50" draw:layer="layout" svg:width="18.549cm" svg:height="4.351cm" svg:x="21.32cm" svg:y="42.275cm">
          <draw:text-box>
            <text:p text:style-name="P47"><text:span text:style-name="T28">Live Signal Performance — EGX30 (Dec 2025 → Mar 2026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um" svg:font-family="Medium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cm" draw:shadow-offset-y="0cm" draw:shadow-color="#000000" draw:shadow-opacity="20%" loext:shadow-blur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23:10:41.690776053</meta:creation-date>
    <dc:date>2026-05-07T03:57:48.578869105</dc:date>
    <meta:editing-duration>PT10H12M15S</meta:editing-duration>
    <meta:editing-cycles>288</meta:editing-cycles>
    <meta:generator>LibreOffice/25.8.6.2$Linux_X86_64 LibreOffice_project/580$Build-2</meta:generator>
    <meta:print-date>2026-05-07T03:38:41.893817012</meta:print-date>
    <meta:printed-by>PDF files</meta:printed-by>
    <meta:document-statistic meta:object-count="58"/>
  </office:meta>
</office:document-meta>
</file>