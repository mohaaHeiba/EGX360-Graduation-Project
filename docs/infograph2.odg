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0A77075853A.png" manifest:media-type="image/png"/>
  <manifest:file-entry manifest:full-path="Pictures/10000001000004000000022F37247207.png" manifest:media-type="image/png"/>
  <manifest:file-entry manifest:full-path="Pictures/100000010000006D00000071EEE7C723.png" manifest:media-type="image/png"/>
  <manifest:file-entry manifest:full-path="Pictures/10000001000000A8000000661EADFF7B.png" manifest:media-type="image/png"/>
  <manifest:file-entry manifest:full-path="Pictures/100000010000050000000500B3546261.png" manifest:media-type="image/png"/>
  <manifest:file-entry manifest:full-path="Pictures/1000000100000556000003006B82FE97.png" manifest:media-type="image/png"/>
  <manifest:file-entry manifest:full-path="Pictures/10000000000006400000023E3D6D6698.png" manifest:media-type="image/png"/>
  <manifest:file-entry manifest:full-path="Pictures/100000010000018A00000185398704D0.png" manifest:media-type="image/png"/>
  <manifest:file-entry manifest:full-path="Pictures/1000000100000244000000A4E4F61432.png" manifest:media-type="image/png"/>
  <manifest:file-entry manifest:full-path="Pictures/10000001000001E70000008DA059785B.png" manifest:media-type="image/png"/>
  <manifest:file-entry manifest:full-path="Pictures/10000001000003B7000001C2690B4742.png" manifest:media-type="image/png"/>
  <manifest:file-entry manifest:full-path="Pictures/100000010000009C0000002CDD5EE35A.png" manifest:media-type="image/png"/>
  <manifest:file-entry manifest:full-path="Pictures/1000000100000174000000C2C522E926.png" manifest:media-type="image/png"/>
  <manifest:file-entry manifest:full-path="Pictures/10000001000000F7000000CCC66A5DED.png" manifest:media-type="image/png"/>
  <manifest:file-entry manifest:full-path="Pictures/10000001000002A100000500709971E2.png" manifest:media-type="image/png"/>
  <manifest:file-entry manifest:full-path="Pictures/1000000100001C0700000802B55F7D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d4af37" draw:marker-start-width="0.457cm" draw:marker-end-width="0.457cm" draw:stroke-linejoin="round" draw:fill="solid" draw:fill-color="#fffdfa" draw:textarea-horizontal-align="center" draw:textarea-vertical-align="top" draw:auto-grow-height="false" draw:fit-to-size="false" style:shrink-to-fit="false" fo:min-height="4.193cm" fo:min-width="25.235cm" fo:padding-top="0.213cm" fo:padding-bottom="0.213cm" fo:padding-left="0.338cm" fo:padding-right="0.338cm" fo:wrap-option="wrap" loext:decorative="false"/>
    </style:style>
    <style:style style:name="gr2" style:family="graphic" style:parent-style-name="standard">
      <style:graphic-properties draw:fill="solid" draw:fill-color="#042c50" draw:textarea-horizontal-align="justify" draw:textarea-vertical-align="middle" draw:auto-grow-height="false" fo:min-height="10.91cm" fo:min-width="58.911cm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-6.677cm, 0cm, 0cm)" draw:image-opacity="100%" style:mirror="none" loext:decorative="false"/>
    </style:style>
    <style:style style:name="gr4" style:family="graphic" style:parent-style-name="standard">
      <style:graphic-properties draw:stroke="none" draw:fill="none" draw:fill-color="#004586" draw:textarea-horizontal-align="left" fo:min-height="9.322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="solid" draw:fill-color="#042c50" draw:textarea-horizontal-align="justify" draw:textarea-vertical-align="middle" draw:auto-grow-height="false" fo:min-height="4.808cm" fo:min-width="58.911cm" loext:decorative="false"/>
    </style:style>
    <style:style style:name="gr7" style:family="graphic" style:parent-style-name="standard">
      <style:graphic-properties draw:stroke="none" draw:fill="none" draw:fill-color="#004586" fo:min-height="3.45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draw:textarea-horizontal-align="left" fo:min-height="3.419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85cm" svg:stroke-color="#d4af37" draw:stroke-linejoin="round" draw:fill="solid" draw:fill-color="#d4af37" draw:textarea-horizontal-align="center" draw:textarea-vertical-align="top" draw:auto-grow-height="false" draw:fit-to-size="false" style:shrink-to-fit="false" fo:min-height="2.344cm" fo:min-width="6.726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04cm" fo:min-width="13.367cm" fo:padding-top="0cm" fo:padding-bottom="0cm" fo:padding-left="0cm" fo:padding-right="0cm" fo:wrap-option="wrap" loext:decorative="false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85cm" svg:stroke-color="#d4af37" draw:stroke-linejoin="round" draw:fill="solid" draw:fill-color="#004586" draw:textarea-horizontal-align="center" draw:textarea-vertical-align="top" draw:auto-grow-height="false" draw:fit-to-size="false" style:shrink-to-fit="false" fo:min-height="3.673cm" fo:min-width="24.307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center" fo:min-height="4.02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3.27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94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05cm" fo:min-width="0cm" loext:decorative="false"/>
    </style:style>
    <style:style style:name="gr20" style:family="graphic" style:parent-style-name="standard">
      <style:graphic-properties draw:stroke="none" draw:fill="none" draw:textarea-horizontal-align="left" fo:min-height="3.15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fo:min-height="3.54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5.004cm" draw:fill="none" draw:textarea-horizontal-align="center" fo:min-height="4.19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21.306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fo:min-height="7.68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12cm, 0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cm, 16.247cm, 0.796cm, 0.66cm)" draw:image-opacity="100%" style:mirror="none" loext:decorative="false"/>
    </style:style>
    <style:style style:name="gr29" style:family="graphic" style:parent-style-name="standard" style:list-style-name="L1">
      <style:graphic-properties draw:stroke="none" svg:stroke-width="0cm" draw:fill="none" fo:min-height="11.151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cm, 0.551cm)" draw:image-opacity="100%" style:mirror="none" loext:decorative="false"/>
    </style:style>
    <style:style style:name="gr31" style:family="graphic" style:parent-style-name="standard" style:list-style-name="L1">
      <style:graphic-properties draw:stroke="none" draw:fill="none" fo:min-height="5.689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3cm, 0cm, 2.627cm, 0cm)" draw:image-opacity="100%" style:mirror="none" loext:decorative="false"/>
    </style:style>
    <style:style style:name="gr33" style:family="graphic" style:parent-style-name="standard">
      <style:graphic-properties draw:stroke="none" draw:fill="none" fo:min-height="4.83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fo:min-height="1.577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4.603cm, 1.174cm, 1.489cm)" draw:image-opacity="100%" style:mirror="none" loext:decorative="false"/>
    </style:style>
    <style:style style:name="gr36" style:family="graphic" style:parent-style-name="Object_20_with_20_no_20_fill_20_and_20_no_20_line">
      <style:graphic-properties draw:textarea-vertical-align="bottom" fo:min-height="1.577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839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5.215cm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54cm, 1.08cm, 3.701cm, 0.834cm)" draw:image-opacity="100%" style:mirror="none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56cm, 0cm)" draw:image-opacity="100%" style:mirror="none" loext:decorative="false"/>
    </style:style>
    <style:style style:name="gr42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101cm" loext:decorative="false"/>
      <style:paragraph-properties style:writing-mode="lr-tb"/>
    </style:style>
    <style:style style:name="P1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solid" draw:fill-color="#042c5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004586"/>
      <style:paragraph-properties fo:text-align="start"/>
      <style:text-properties fo:color="#d4af37" loext:opacity="100%" fo:font-size="40pt" style:font-size-asian="40pt" style:font-size-complex="40pt"/>
    </style:style>
    <style:style style:name="P6" style:family="paragraph">
      <loext:graphic-properties draw:fill="none" draw:fill-color="#004586"/>
      <style:text-properties fo:color="#d4af37" loext:opacity="100%" fo:font-size="32pt" style:font-size-asian="32pt" style:font-size-complex="3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 fo:text-align="start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solid" draw:fill-color="#d4af3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solid" draw:fill-color="#0045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margin-top="0.1cm" fo:margin-bottom="0.1cm" fo:line-height="115%" fo:text-align="center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fo:font-size="40pt" style:font-size-asian="55pt" style:font-size-complex="55pt"/>
    </style:style>
    <style:style style:name="P19" style:family="paragraph">
      <loext:graphic-properties draw:fill="none"/>
      <style:text-properties fo:color="#ffffff" loext:opacity="100%" fo:font-size="40pt" style:font-size-asian="55pt" style:font-size-complex="55pt"/>
    </style:style>
    <style:style style:name="P20" style:family="paragraph">
      <style:paragraph-properties fo:text-align="center"/>
      <style:text-properties fo:font-size="40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P23" style:family="paragraph">
      <loext:graphic-properties draw:fill="none"/>
      <style:paragraph-properties fo:text-align="center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P27" style:family="paragraph">
      <style:paragraph-properties fo:margin-left="0cm" fo:margin-right="0cm" fo:margin-top="0.12cm" fo:margin-bottom="0.05cm" fo:line-height="115%" fo:text-align="start" fo:text-indent="0cm"/>
    </style:style>
    <style:style style:name="P28" style:family="paragraph">
      <style:paragraph-properties fo:margin-left="0cm" fo:margin-right="0cm" fo:margin-top="0.02cm" fo:margin-bottom="0cm" fo:line-height="115%" fo:text-align="start" fo:text-indent="0cm"/>
    </style:style>
    <style:style style:name="P29" style:family="paragraph">
      <style:paragraph-properties fo:margin-left="0cm" fo:margin-right="0cm" fo:margin-top="0.12cm" fo:margin-bottom="0.05cm" fo:line-height="150%" fo:text-align="start" fo:text-indent="0cm"/>
    </style:style>
    <style:style style:name="P30" style:family="paragraph">
      <style:paragraph-properties fo:margin-left="0cm" fo:margin-right="0cm" fo:margin-top="0.42cm" fo:margin-bottom="0.35cm" fo:line-height="115%" fo:text-align="start" fo:text-indent="0cm"/>
    </style:style>
    <style:style style:name="P31" style:family="paragraph">
      <loext:graphic-properties draw:fill="none"/>
      <style:paragraph-properties fo:margin-left="0cm" fo:margin-right="0cm" fo:margin-top="0.12cm" fo:margin-bottom="0.0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62cm" fo:margin-bottom="0.55cm" fo:line-height="100%" fo:text-indent="0cm"/>
    </style:style>
    <style:style style:name="P33" style:family="paragraph">
      <loext:graphic-properties draw:fill="none"/>
      <style:paragraph-properties fo:margin-left="0cm" fo:margin-right="0cm" fo:margin-top="0.62cm" fo:margin-bottom="0.5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5cm" fo:margin-bottom="0.5cm" fo:line-height="100%" fo:text-indent="0cm"/>
    </style:style>
    <style:style style:name="P35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.42cm" fo:margin-bottom="0.35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0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color="#000000" loext:opacity="100%" fo:font-size="28pt" style:font-size-asian="28pt" style:font-size-complex="28pt"/>
    </style:style>
    <style:style style:name="P41" style:family="paragraph">
      <loext:graphic-properties draw:fill="none"/>
      <style:paragraph-properties fo:text-align="center"/>
      <style:text-properties fo:color="#000000" loext:opacity="100%"/>
    </style:style>
    <style:style style:name="P42" style:family="paragraph">
      <loext:graphic-properties draw:fill="none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/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P46" style:family="paragraph">
      <loext:graphic-properties draw:fill="none"/>
      <style:paragraph-properties fo:margin-top="0.42cm" fo:margin-bottom="0.35cm"/>
      <style:text-properties fo:color="#000000" loext:opacity="100%" fo:font-size="26pt" style:font-size-asian="10pt" style:font-size-complex="10pt"/>
    </style:style>
    <style:style style:name="T1" style:family="text">
      <style:text-properties fo:color="#d4af37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2" style:family="text">
      <style:text-properties fo:color="#ffffff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3" style:family="text">
      <style:text-properties fo:color="#ffffff" loext:opacity="100%" style:font-name="Montserrat" fo:font-size="56pt" fo:font-weight="normal" fo:background-color="transparent" style:font-size-asian="56pt" style:font-weight-asian="normal" style:font-size-complex="56pt" style:font-weight-complex="normal"/>
    </style:style>
    <style:style style:name="T4" style:family="text">
      <style:text-properties fo:color="#ffffff" loext:opacity="100%" style:font-name="Medium" fo:font-size="56pt" fo:font-weight="normal" fo:background-color="transparent" style:font-size-asian="56pt" style:font-weight-asian="normal" style:font-size-complex="56pt" style:font-weight-complex="normal"/>
    </style:style>
    <style:style style:name="T5" style:family="text">
      <style:text-properties fo:color="#ffffff" loext:opacity="100%" style:font-name="Medium" fo:font-size="54pt" fo:font-weight="normal" fo:background-color="transparent" style:font-size-asian="54pt" style:font-weight-asian="normal" style:font-size-complex="54pt" style:font-weight-complex="normal"/>
    </style:style>
    <style:style style:name="T6" style:family="text">
      <style:text-properties fo:color="#d4af37" loext:opacity="100%" style:font-name="Medium" fo:font-size="40pt" fo:font-weight="normal" fo:background-color="transparent" style:font-size-asian="40pt" style:font-weight-asian="normal" style:font-size-complex="40pt" style:font-weight-complex="normal"/>
    </style:style>
    <style:style style:name="T7" style:family="text">
      <style:text-properties fo:color="#d4af37" loext:opacity="100%" style:font-name="Medium" fo:font-size="40pt" fo:font-weight="bold" fo:background-color="transparent" style:font-size-asian="40pt" style:font-weight-asian="bold" style:font-size-complex="40pt" style:font-weight-complex="bold"/>
    </style:style>
    <style:style style:name="T8" style:family="text">
      <style:text-properties fo:color="#d4af37" loext:opacity="100%" fo:font-size="32pt" style:font-size-asian="32pt" style:font-size-complex="32pt"/>
    </style:style>
    <style:style style:name="T9" style:family="text"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0pt" style:font-style-asian="normal" style:font-weight-asian="bold" style:font-name-complex="Noto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size-complex="55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5pt" style:font-style-asian="normal" style:font-weight-asian="bold" style:font-name-complex="Noto Sans Devanagari" style:font-size-complex="5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T17" style:family="text">
      <style:text-properties fo:color="#000000" loext:opacity="100%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style:letter-kerning="true" style:font-name-asian="Noto Sans CJK SC" style:font-size-asian="26pt" style:font-style-asian="normal" style:font-name-complex="Noto Sans Devanagari" style:font-size-complex="26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pt" fo:font-style="normal" fo:text-shadow="none" style:text-underline-style="none" fo:font-weight="bold" style:letter-kerning="true" style:font-name-asian="Noto Sans CJK SC" style:font-size-asian="2pt" style:font-style-asian="normal" style:font-weight-asian="bold" style:font-name-complex="Noto Sans Devanagari" style:font-size-complex="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1pt 1pt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T28" style:family="text">
      <style:text-properties fo:color="#000000" loext:opacity="100%" fo:font-size="2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2" draw:style-name="gr1" draw:text-style-name="P1" draw:layer="layout" svg:width="26.003cm" svg:height="4.711cm" svg:x="31.162cm" svg:y="73.39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2" draw:text-style-name="P2" draw:layer="layout" svg:width="59.411cm" svg:height="11.1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3.337cm" svg:height="7.024cm" svg:x="34.655cm" svg:y="2.231cm">
          <draw:image xlink:href="Pictures/10000001000001E70000008DA059785B.png" xlink:type="simple" xlink:show="embed" xlink:actuate="onLoad" draw:mime-type="image/png">
            <text:p/>
          </draw:image>
        </draw:frame>
        <draw:frame draw:style-name="gr4" draw:text-style-name="P5" draw:layer="layout" svg:width="39.052cm" svg:height="9.572cm" svg:x="1.635cm" svg:y="1.317cm">
          <draw:text-box>
            <text:p text:style-name="P4"><text:span text:style-name="T1">E</text:span><text:span text:style-name="T1">G</text:span><text:span text:style-name="T1">X</text:span><text:span text:style-name="T1">3</text:span><text:span text:style-name="T1">6</text:span><text:span text:style-name="T1">0</text:span><text:span text:style-name="T2"> </text:span><text:span text:style-name="T2">-</text:span><text:span text:style-name="T2"> </text:span><text:span text:style-name="T3">I</text:span><text:span text:style-name="T3">n</text:span><text:span text:style-name="T3">t</text:span><text:span text:style-name="T3">e</text:span><text:span text:style-name="T3">l</text:span><text:span text:style-name="T3">l</text:span><text:span text:style-name="T3">i</text:span><text:span text:style-name="T3">g</text:span><text:span text:style-name="T3">e</text:span><text:span text:style-name="T3">n</text:span><text:span text:style-name="T3">t</text:span><text:span text:style-name="T4"> </text:span><text:span text:style-name="T4">S</text:span><text:span text:style-name="T4">t</text:span><text:span text:style-name="T4">o</text:span><text:span text:style-name="T4">c</text:span><text:span text:style-name="T4">k</text:span><text:span text:style-name="T4"> </text:span><text:span text:style-name="T5">M</text:span><text:span text:style-name="T5">a</text:span><text:span text:style-name="T5">r</text:span><text:span text:style-name="T5">k</text:span><text:span text:style-name="T5">e</text:span><text:span text:style-name="T5">t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o</text:span><text:span text:style-name="T5">r</text:span><text:span text:style-name="T5">e</text:span><text:span text:style-name="T5">c</text:span><text:span text:style-name="T5">a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P</text:span><text:span text:style-name="T5">l</text:span><text:span text:style-name="T5">a</text:span><text:span text:style-name="T5">t</text:span><text:span text:style-name="T5">f</text:span><text:span text:style-name="T5">o</text:span><text:span text:style-name="T5">r</text:span><text:span text:style-name="T5">m</text:span></text:p>
            <text:p text:style-name="P4"><text:span text:style-name="T6">A</text:span><text:span text:style-name="T6">I</text:span><text:span text:style-name="T6">-</text:span><text:span text:style-name="T6">P</text:span><text:span text:style-name="T6">o</text:span><text:span text:style-name="T6">w</text:span><text:span text:style-name="T6">e</text:span><text:span text:style-name="T6">r</text:span><text:span text:style-name="T6">e</text:span><text:span text:style-name="T6">d</text:span><text:span text:style-name="T6"> </text:span><text:span text:style-name="T6">E</text:span><text:span text:style-name="T6">G</text:span><text:span text:style-name="T6">X</text:span><text:span text:style-name="T6">3</text:span><text:span text:style-name="T6">0</text:span><text:span text:style-name="T6"> </text:span><text:span text:style-name="T6">F</text:span><text:span text:style-name="T6">o</text:span><text:span text:style-name="T6">r</text:span><text:span text:style-name="T6">e</text:span><text:span text:style-name="T6">c</text:span><text:span text:style-name="T6">a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P</text:span><text:span text:style-name="T6">l</text:span><text:span text:style-name="T6">a</text:span><text:span text:style-name="T6">t</text:span><text:span text:style-name="T6">f</text:span><text:span text:style-name="T6">o</text:span><text:span text:style-name="T6">r</text:span><text:span text:style-name="T6">m</text:span><text:span text:style-name="T7"> </text:span></text:p>
          </draw:text-box>
        </draw:frame>
        <draw:g draw:style-name="gr5">
          <draw:custom-shape draw:style-name="gr6" draw:text-style-name="P2" draw:layer="layout" svg:width="59.411cm" svg:height="5.058cm" svg:x="0cm" svg:y="79.0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55.057cm" svg:height="3.703cm" svg:x="0.553cm" svg:y="80.396cm">
            <draw:text-box>
              <text:p><text:span text:style-name="T8">King Salman International University - El Tor Campus </text:span><text:span text:style-name="T8">- South Sinai | www.ksiu.edua.eg</text:span></text:p>
            </draw:text-box>
          </draw:frame>
        </draw:g>
        <draw:g draw:style-name="gr5">
          <draw:frame draw:style-name="gr8" draw:text-style-name="P7" draw:layer="layout" svg:width="32.329cm" svg:height="28.031cm" svg:x="26.717cm" svg:y="6.941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9">
            <draw:frame draw:style-name="gr8" draw:text-style-name="P7" draw:layer="layout" svg:width="18.698cm" svg:height="10.028cm" svg:x="33.596cm" svg:y="15.589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8" draw:text-style-name="P7" draw:layer="layout" svg:width="6.353cm" svg:height="10.518cm" svg:x="49.186cm" svg:y="16.999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frame draw:style-name="gr10" draw:text-style-name="P9" draw:layer="layout" svg:width="46.457cm" svg:height="3.669cm" svg:x="33.067cm" svg:y="30.351cm">
          <draw:text-box>
            <text:p text:style-name="P8"><text:span text:style-name="T9">Results &amp; </text:span><text:span text:style-name="T9">Performance</text:span></text:p>
          </draw:text-box>
        </draw:frame>
        <draw:g draw:style-name="gr5">
          <draw:custom-shape draw:name="Shape 9" draw:style-name="gr11" draw:text-style-name="P10" draw:layer="layout" svg:width="7.278cm" svg:height="2.646cm" svg:x="37.665cm" svg:y="32.453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 78" draw:style-name="gr12" draw:text-style-name="P11" draw:layer="layout" svg:width="13.366cm" svg:height="1.203cm" svg:x="35.43cm" svg:y="33.678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2" draw:layer="layout" svg:width="5.714cm" svg:height="1.817cm" svg:x="38.467cm" svg:y="32.65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" draw:style-name="gr14" draw:text-style-name="P13" draw:layer="layout" svg:width="24.885cm" svg:height="4.001cm" svg:x="32.141cm" svg:y="32.432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5" draw:text-style-name="P15" draw:layer="layout" svg:width="13.038cm" svg:height="3.211cm" svg:x="31.797cm" svg:y="34.832cm">
            <text:p text:style-name="P14"><text:span text:style-name="T10">Backtest Alpha</text:span></text:p>
            <text:p text:style-name="P14"><text:span text:style-name="T11"/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" draw:text-style-name="P17" draw:layer="layout" svg:width="29.874cm" svg:height="4.272cm" svg:x="35.261cm" svg:y="34.828cm">
            <draw:text-box>
              <text:p text:style-name="P16"><text:span text:style-name="T12">Model </text:span><text:span text:style-name="T12">Accurac</text:span><text:span text:style-name="T12">y</text:span></text:p>
              <text:p text:style-name="P16"><text:span text:style-name="T13"/></text:p>
            </draw:text-box>
          </draw:frame>
          <draw:frame draw:style-name="gr17" draw:text-style-name="P18" draw:layer="layout" svg:width="12.049cm" svg:height="3.526cm" svg:x="34.285cm" svg:y="33.07cm">
            <draw:text-box>
              <text:p><text:span text:style-name="T14">+</text:span><text:span text:style-name="T14">1</text:span><text:span text:style-name="T14">5</text:span><text:span text:style-name="T14">9</text:span><text:span text:style-name="T14">.</text:span><text:span text:style-name="T14">0</text:span><text:span text:style-name="T14">9</text:span><text:span text:style-name="T14">%</text:span></text:p>
            </draw:text-box>
          </draw:frame>
          <draw:frame draw:style-name="gr18" draw:text-style-name="P19" draw:layer="layout" svg:width="6.901cm" svg:height="2.197cm" svg:x="47.279cm" svg:y="33.07cm">
            <draw:text-box>
              <text:p><text:span text:style-name="T15">90%</text:span></text:p>
            </draw:text-box>
          </draw:frame>
          <draw:custom-shape draw:style-name="gr19" draw:text-style-name="P20" draw:layer="layout" svg:width="0.132cm" svg:height="2.255cm" svg:x="44.164cm" svg:y="32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2" draw:layer="layout" svg:width="19.6cm" svg:height="3.401cm" svg:x="3.54cm" svg:y="13.474cm">
          <draw:text-box>
            <text:p text:style-name="P21"><text:span text:style-name="T16">Aim&amp; Rationale </text:span></text:p>
          </draw:text-box>
        </draw:frame>
        <draw:frame draw:style-name="gr21" draw:text-style-name="P23" draw:layer="layout" svg:width="17.462cm" svg:height="3.791cm" svg:x="33.385cm" svg:y="12.43cm">
          <draw:text-box>
            <text:p text:style-name="P4"><text:span text:style-name="T9">Adaptive Dashboard</text:span></text:p>
          </draw:text-box>
        </draw:frame>
        <draw:frame draw:style-name="gr20" draw:text-style-name="P24" draw:layer="layout" svg:width="17.639cm" svg:height="3.401cm" svg:x="17.333cm" svg:y="49.034cm">
          <draw:text-box>
            <text:p text:style-name="P21"><text:span text:style-name="T17">Future Work</text:span></text:p>
          </draw:text-box>
        </draw:frame>
        <draw:frame draw:style-name="gr22" draw:text-style-name="P26" draw:layer="layout" svg:width="19.536cm" svg:height="4.445cm" svg:x="28.771cm" svg:y="58.785cm">
          <draw:text-box>
            <text:p text:style-name="P25"><text:span text:style-name="T18"><text:s/>Download EGX360</text:span></text:p>
          </draw:text-box>
        </draw:frame>
        <draw:frame draw:style-name="gr23" draw:text-style-name="P31" draw:layer="layout" svg:width="13.652cm" svg:height="21.556cm" svg:x="2.27cm" svg:y="50.881cm">
          <draw:text-box>
            <text:p text:style-name="P27"><text:span text:style-name="T19">Technical Expertise</text:span></text:p>
            <text:list text:style-name="L1">
              <text:list-item>
                <text:p text:style-name="P27"><text:span text:style-name="T19">Stacking</text:span><text:span text:style-name="T20">: Optimized XGBoost &amp; LightGBM base learners.</text:span></text:p>
              </text:list-item>
              <text:list-item>
                <text:p text:style-name="P27"><text:span text:style-name="T19">Optuna</text:span><text:span text:style-name="T20">: Bayesian optimization for robust model stability</text:span></text:p>
              </text:list-item>
              <text:list-item>
                <text:p text:style-name="P28"><text:span text:style-name="T19">Cloud: </text:span><text:span text:style-name="T20">AWS &amp; Supabase deployment.</text:span></text:p>
              </text:list-item>
            </text:list>
            <text:p text:style-name="P29"><text:span text:style-name="T19">Core Knowledge</text:span></text:p>
            <text:list text:continue-numbering="true" text:style-name="L1">
              <text:list-item>
                <text:p text:style-name="P28"><text:span text:style-name="T19">Quant: </text:span><text:span text:style-name="T20">Technical &amp; Macro correlations.</text:span></text:p>
              </text:list-item>
              <text:list-item>
                <text:p text:style-name="P28"><text:span text:style-name="T19">NLP: </text:span><text:span text:style-name="T20">Hugging Face sentiment analysis.</text:span></text:p>
                <text:p text:style-name="P28"><text:span text:style-name="T21"/></text:p>
              </text:list-item>
            </text:list>
            <text:p text:style-name="P30"><text:span text:style-name="T19"/></text:p>
          </draw:text-box>
        </draw:frame>
        <draw:frame draw:style-name="gr24" draw:text-style-name="P33" draw:layer="layout" svg:width="24.448cm" svg:height="7.937cm" svg:x="4.174cm" svg:y="16.24cm">
          <draw:text-box>
            <text:p text:style-name="P32"><text:span text:style-name="T19">The Problem: </text:span><text:span text:style-name="T20">Egypt's retail </text:span><text:span text:style-name="T20">investors make </text:span><text:span text:style-name="T20">decisions with no </text:span><text:span text:style-name="T20">real AI support.</text:span></text:p>
            <text:p text:style-name="P32"><text:span text:style-name="T19">The Goal: </text:span><text:span text:style-name="T20">EGX360 </text:span><text:span text:style-name="T20">predicts</text:span><text:span text:style-name="T22">ز</text:span><text:span text:style-name="T22"> </text:span><text:span text:style-name="T20">market </text:span><text:span text:style-name="T20">moves before they </text:span><text:span text:style-name="T20">happen — with </text:span><text:span text:style-name="T20">90% accuracy</text:span></text:p>
            <text:p text:style-name="P32"><text:span text:style-name="T19">Rationale:</text:span><text:span text:style-name="T20"> Built on </text:span><text:span text:style-name="T20">AWS cloud — </text:span><text:span text:style-name="T20">scales to any </text:span><text:span text:style-name="T20">market, any </text:span><text:span text:style-name="T20">volume, in real </text:span><text:span text:style-name="T20">time.</text:span></text:p>
          </draw:text-box>
        </draw:frame>
        <draw:frame draw:style-name="gr25" draw:text-style-name="P3" draw:layer="layout" svg:width="9.207cm" svg:height="9.088cm" svg:x="39.1cm" svg:y="61.762cm">
          <draw:image xlink:href="Pictures/100000010000018A00000185398704D0.png" xlink:type="simple" xlink:show="embed" xlink:actuate="onLoad" draw:mime-type="image/png">
            <text:p/>
          </draw:image>
        </draw:frame>
        <draw:frame draw:style-name="gr26" draw:text-style-name="P3" draw:layer="layout" svg:width="2.712cm" svg:height="0.001cm" svg:x="22.312cm" svg:y="31.48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5" draw:text-style-name="P3" draw:layer="layout" svg:width="1.827cm" svg:height="1.827cm" svg:x="41.268cm" svg:y="27.731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27" draw:text-style-name="P3" draw:layer="layout" svg:width="2.048cm" svg:height="1.649cm" svg:x="33.965cm" svg:y="27.67cm">
          <draw:image xlink:href="Pictures/100000010000009C0000002CDD5EE35A.png" xlink:type="simple" xlink:show="embed" xlink:actuate="onLoad" draw:mime-type="image/png">
            <text:p/>
          </draw:image>
        </draw:frame>
        <draw:frame draw:style-name="gr28" draw:text-style-name="P3" draw:layer="layout" svg:width="1.588cm" svg:height="1.777cm" svg:x="37.775cm" svg:y="27.731cm">
          <draw:image xlink:href="Pictures/1000000100000244000000A4E4F61432.png" xlink:type="simple" xlink:show="embed" xlink:actuate="onLoad" draw:mime-type="image/png">
            <text:p/>
          </draw:image>
        </draw:frame>
        <draw:frame draw:style-name="gr29" draw:text-style-name="P35" draw:layer="layout" svg:width="12.592cm" svg:height="16.626cm" svg:x="16.451cm" svg:y="51.684cm">
          <draw:text-box>
            <text:p text:style-name="P34"><text:span text:style-name="T19">Live Brokerage Integration</text:span><text:span text:style-name="T20">: </text:span><text:span text:style-name="T20">Migrating from paper-trading to </text:span><text:span text:style-name="T20">real-world execution via local </text:span><text:span text:style-name="T20">brokerage APIs for automated </text:span><text:span text:style-name="T20">trade execution.</text:span></text:p>
            <text:p text:style-name="P34"><text:span text:style-name="T19">Multi-Index Expansion</text:span><text:span text:style-name="T20">: </text:span><text:span text:style-name="T20">Adapting the Stacking </text:span><text:span text:style-name="T20">Ensemble model to forecast </text:span><text:span text:style-name="T20">broader indices like EGX70 <text:s/>for </text:span><text:span text:style-name="T20">diversified stock </text:span></text:p>
            <text:p text:style-name="P34"><text:span text:style-name="T19">SHAP-Based Explainability</text:span><text:span text:style-name="T20">: </text:span><text:span text:style-name="T20">Utilizing Explainable AI (XAI) to </text:span><text:span text:style-name="T20">show users exactly how </text:span><text:span text:style-name="T20">macroeconomic factors </text:span><text:span text:style-name="T20">influenced each signal.</text:span></text:p>
          </draw:text-box>
        </draw:frame>
        <draw:frame draw:style-name="gr30" draw:text-style-name="P3" draw:layer="layout" svg:width="10.877cm" svg:height="7.937cm" svg:x="92.993cm" svg:y="49.895cm">
          <draw:image xlink:href="Pictures/1000000100000174000000C2C522E926.png" xlink:type="simple" xlink:show="embed" xlink:actuate="onLoad" draw:mime-type="image/png">
            <text:p/>
          </draw:image>
        </draw:frame>
        <draw:frame draw:style-name="gr20" draw:text-style-name="P37" draw:layer="layout" svg:width="17.465cm" svg:height="3.401cm" svg:x="3.22cm" svg:y="48.942cm">
          <draw:text-box>
            <text:p text:style-name="P36"><text:span text:style-name="T9">Lessons </text:span><text:span text:style-name="T9">Learned</text:span></text:p>
          </draw:text-box>
        </draw:frame>
        <draw:frame draw:style-name="gr31" draw:text-style-name="P39" draw:layer="layout" svg:width="26.809cm" svg:height="5.939cm" svg:x="3.083cm" svg:y="72.12cm">
          <draw:text-box>
            <text:p text:style-name="P38"><text:span text:style-name="T23">EGX360 achieves 90% accuracy by synergizing Egypt-specific macroeconomic indicators with a robust Stacking Ensemble. This project bridges the gap between raw data and actionable intelligence, providing retail investors with a production-ready tool for market volatility.a</text:span></text:p>
          </draw:text-box>
        </draw:frame>
        <draw:frame draw:style-name="gr32" draw:text-style-name="P3" draw:layer="layout" svg:width="25.717cm" svg:height="9.135cm" svg:x="31.48cm" svg:y="47.745cm">
          <draw:image xlink:href="Pictures/10000000000006400000023E3D6D6698.png" xlink:type="simple" xlink:show="embed" xlink:actuate="onLoad" draw:mime-type="image/png">
            <text:p/>
          </draw:image>
        </draw:frame>
        <draw:frame draw:style-name="gr33" draw:text-style-name="P40" draw:layer="layout" svg:width="27.342cm" svg:height="5.08cm" svg:x="31.76cm" svg:y="74.025cm">
          <draw:text-box>
            <text:p text:style-name="P34"><text:span text:style-name="T24">Presented by: Mohamed Taher Amin</text:span><text:span text:style-name="T24"><text:line-break/></text:span><text:span text:style-name="T24">Supervisor: Dr. Samy Abdelnabi</text:span><text:span text:style-name="T24"><text:line-break/></text:span><text:span text:style-name="T24">Assistant: ENG: AbdulAziz</text:span></text:p>
          </draw:text-box>
        </draw:frame>
        <draw:frame draw:style-name="gr34" draw:text-style-name="P41" draw:layer="layout" svg:width="17.683cm" svg:height="1.827cm" svg:x="3.319cm" svg:y="69.897cm">
          <draw:text-box>
            <text:p text:style-name="P4"><text:span text:style-name="T9">Conclusion</text:span></text:p>
          </draw:text-box>
        </draw:frame>
        <draw:frame draw:style-name="gr35" draw:text-style-name="P3" draw:layer="layout" svg:width="25.718cm" svg:height="9.295cm" svg:x="31.48cm" svg:y="38.147cm">
          <draw:image xlink:href="Pictures/10000001000003B7000001C2690B4742.png" xlink:type="simple" xlink:show="embed" xlink:actuate="onLoad" draw:mime-type="image/png">
            <text:p/>
          </draw:image>
        </draw:frame>
        <draw:frame draw:style-name="gr36" draw:text-style-name="P4" draw:layer="layout" svg:width="5.127cm" svg:height="1.827cm" svg:x="1.905cm" svg:y="19.175cm">
          <draw:text-box>
            <text:p text:style-name="P4"><text:span text:style-name="T25">🎯</text:span></text:p>
          </draw:text-box>
        </draw:frame>
        <draw:frame draw:style-name="gr37" draw:text-style-name="P42" draw:layer="layout" svg:width="5.117cm" svg:height="2.089cm" svg:x="1.944cm" svg:y="21.849cm">
          <draw:text-box>
            <text:p text:style-name="P38"><text:span text:style-name="T26">⚡</text:span><text:span text:style-name="T22">ز</text:span></text:p>
          </draw:text-box>
        </draw:frame>
        <draw:frame draw:style-name="gr38" draw:text-style-name="P42" draw:layer="layout" svg:width="3.042cm" svg:height="1.827cm" svg:x="2.085cm" svg:y="16.635cm">
          <draw:text-box>
            <text:p><text:span text:style-name="T26">⚠️ <text:s/></text:span></text:p>
          </draw:text-box>
        </draw:frame>
        <draw:custom-shape draw:style-name="gr39" draw:text-style-name="P43" draw:layer="layout" svg:width="5.715cm" svg:height="0.953cm" svg:x="9.255cm" svg:y="42.91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27.085cm" svg:height="10.478cm" svg:x="2.27cm" svg:y="26.717cm">
          <draw:image xlink:href="Pictures/1000000100001C0700000802B55F7D87.png" xlink:type="simple" xlink:show="embed" xlink:actuate="onLoad" draw:mime-type="image/png">
            <text:p/>
          </draw:image>
        </draw:frame>
        <draw:frame draw:style-name="gr26" draw:text-style-name="P3" draw:layer="layout" svg:width="2.976cm" svg:height="1.587cm" svg:x="44.443cm" svg:y="28.049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40" draw:text-style-name="P3" draw:layer="layout" svg:width="25.696cm" svg:height="7.938cm" svg:x="2.905cm" svg:y="40.052cm">
          <draw:image xlink:href="Pictures/10000001000004000000022F37247207.png" xlink:type="simple" xlink:show="embed" xlink:actuate="onLoad" draw:mime-type="image/png">
            <text:p/>
          </draw:image>
        </draw:frame>
        <draw:frame draw:style-name="gr41" draw:text-style-name="P3" draw:layer="layout" svg:width="2.851cm" svg:height="1.719cm" svg:x="48.57cm" svg:y="27.731cm">
          <draw:image xlink:href="Pictures/10000001000000F7000000CCC66A5DED.png" xlink:type="simple" xlink:show="embed" xlink:actuate="onLoad" draw:mime-type="image/png">
            <text:p/>
          </draw:image>
        </draw:frame>
        <draw:frame draw:style-name="gr25" draw:text-style-name="P3" draw:layer="layout" svg:width="3.23cm" svg:height="1.792cm" svg:x="52.38cm" svg:y="27.844cm">
          <draw:image xlink:href="Pictures/100000010000012D000000A77075853A.png" xlink:type="simple" xlink:show="embed" xlink:actuate="onLoad" draw:mime-type="image/png">
            <text:p/>
          </draw:image>
        </draw:frame>
        <draw:frame draw:style-name="gr42" draw:text-style-name="P45" draw:layer="layout" svg:width="16.735cm" svg:height="3.326cm" svg:x="84.82cm" svg:y="31.162cm">
          <draw:text-box>
            <text:p text:style-name="P44"><text:span text:style-name="T27">Results &amp; Benchmark </text:span><text:span text:style-name="T27">Comparison</text:span></text:p>
          </draw:text-box>
        </draw:frame>
        <draw:frame draw:style-name="gr43" draw:text-style-name="P46" draw:layer="layout" svg:width="18.549cm" svg:height="4.351cm" svg:x="32.115cm" svg:y="37.195cm">
          <draw:text-box>
            <text:p text:style-name="P44"><text:span text:style-name="T28">Live Signal Performance — </text:span><text:span text:style-name="T28">EGX30 (Dec 2025 → Mar </text:span><text:span text:style-name="T28">2026)</text:span></text:p>
          </draw:text-box>
        </draw:frame>
        <draw:frame draw:style-name="gr38" draw:text-style-name="P42" draw:layer="layout" svg:width="13.429cm" svg:height="1.827cm" svg:x="3.222cm" svg:y="37.512cm">
          <draw:text-box>
            <text:p><text:span text:style-name="T9">Stacking Ensemble</text:span></text:p>
          </draw:text-box>
        </draw:frame>
        <draw:frame draw:style-name="gr38" draw:text-style-name="P42" draw:layer="layout" svg:width="14.161cm" svg:height="1.827cm" svg:x="3.349cm" svg:y="25.13cm">
          <draw:text-box>
            <text:p><text:span text:style-name="T9">System </text:span><text:span text:style-name="T9">Architectur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cm" draw:shadow-offset-y="0cm" draw:shadow-color="#000000" draw:shadow-opacity="20%" loext:shadow-blur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3:10:41.690776053</meta:creation-date>
    <dc:date>2026-05-11T23:14:42.668981145</dc:date>
    <meta:editing-duration>PT10H40M42S</meta:editing-duration>
    <meta:editing-cycles>300</meta:editing-cycles>
    <meta:generator>LibreOffice/25.8.6.2$Linux_X86_64 LibreOffice_project/580$Build-2</meta:generator>
    <meta:print-date>2026-05-07T03:38:41.893817012</meta:print-date>
    <meta:printed-by>PDF files</meta:printed-by>
    <meta:document-statistic meta:object-count="55"/>
  </office:meta>
</office:document-meta>
</file>